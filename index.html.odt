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pleSystemUIFont" svg:font-family="AppleSystemUIFont" style:font-family-generic="system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3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4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5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6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7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8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9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0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1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2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3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4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5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6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7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8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1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2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3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4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5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6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7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8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199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2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3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4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5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6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7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8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09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10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P2011" style:parent-style-name="Normal" style:family="paragraph">
      <style:paragraph-properties style:text-autospace="none" fo:margin-bottom="0in" fo:line-height="100%"/>
      <style:text-properties style:font-name="AppleSystemUIFont" style:font-name-complex="AppleSystemUIFont" style:letter-kerning="false" fo:font-size="13pt" style:font-size-asian="13pt" style:font-size-complex="13pt" fo:language="en" fo:country="US"/>
    </style:style>
    <style:style style:name="T2012" style:parent-style-name="DefaultParagraphFont" style:family="text">
      <style:text-properties style:font-name="AppleSystemUIFont" style:font-name-complex="AppleSystemUIFont" style:letter-kerning="false" fo:font-size="13pt" style:font-size-asian="13pt" style:font-size-complex="13pt" fo:language="en" fo:country="US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&lt;meta charset="UTF-8" /&gt;</text:p>
      <text:p text:style-name="P5">&lt;meta name="viewport" content="width=device-width, initial-scale=1.0" /&gt;</text:p>
      <text:p text:style-name="P6">&lt;title&gt;N Audio Lights &amp; Sound – Coron, Palawan&lt;/title&gt;</text:p>
      <text:p text:style-name="P7">&lt;link href="https://fonts.googleapis.com/css2?family=Bebas+Neue&amp;family=DM+Sans:ital,wght@0,300;0,400;0,500;0,700;1,400&amp;family=Barlow+Condensed:wght@400;600;700;800&amp;display=swap" rel="stylesheet" /&gt;</text:p>
      <text:p text:style-name="P8">&lt;style&gt;</text:p>
      <text:p text:style-name="P9"><text:s text:c="2"/>:root {</text:p>
      <text:p text:style-name="P10"><text:s text:c="4"/>--g900: #0a1a0e;</text:p>
      <text:p text:style-name="P11"><text:s text:c="4"/>--g800: #0f2414;</text:p>
      <text:p text:style-name="P12"><text:s text:c="4"/>--g700: #1a3a20;</text:p>
      <text:p text:style-name="P13"><text:s text:c="4"/>--g600: #1f4a28;</text:p>
      <text:p text:style-name="P14"><text:s text:c="4"/>--g500: #2d6a3f;</text:p>
      <text:p text:style-name="P15"><text:s text:c="4"/>--g400: #3d8b52;</text:p>
      <text:p text:style-name="P16"><text:s text:c="4"/>--g300: #52b36b;</text:p>
      <text:p text:style-name="P17"><text:s text:c="4"/>--g200: #7dd494;</text:p>
      <text:p text:style-name="P18"><text:s text:c="4"/>--g100: #b8f0c8;</text:p>
      <text:p text:style-name="P19"><text:s text:c="4"/>--glow: #3d8b5266;</text:p>
      <text:p text:style-name="P20"><text:s text:c="4"/>--glowbright: #52b36b99;</text:p>
      <text:p text:style-name="P21"><text:s text:c="4"/>--white: #f0f7f1;</text:p>
      <text:p text:style-name="P22"><text:s text:c="4"/>--offwhite: #d4e8d8;</text:p>
      <text:p text:style-name="P23"><text:s text:c="4"/>--muted: #7a9e82;</text:p>
      <text:p text:style-name="P24"><text:s text:c="4"/>--dark: #060e08;</text:p>
      <text:p text:style-name="P25"><text:s text:c="4"/>--card: #0d1f10;</text:p>
      <text:p text:style-name="P26"><text:s text:c="4"/>--border: #1f4a2833;</text:p>
      <text:p text:style-name="P27"><text:s text:c="2"/>}</text:p>
      <text:p text:style-name="P28"/>
      <text:p text:style-name="P29"><text:s text:c="2"/>*, *::before, *::after { box-sizing: border-box; margin: 0; padding: 0; }</text:p>
      <text:p text:style-name="P30"/>
      <text:p text:style-name="P31"><text:s text:c="2"/>html { scroll-behavior: smooth; }</text:p>
      <text:p text:style-name="P32"/>
      <text:p text:style-name="P33"><text:s text:c="2"/>body {</text:p>
      <text:p text:style-name="P34"><text:s text:c="4"/>background: var(--g900);</text:p>
      <text:p text:style-name="P35"><text:s text:c="4"/>color: var(--white);</text:p>
      <text:p text:style-name="P36"><text:s text:c="4"/>font-family: 'DM Sans', sans-serif;</text:p>
      <text:p text:style-name="P37"><text:s text:c="4"/>overflow-x: hidden;</text:p>
      <text:soft-page-break/>
      <text:p text:style-name="P38"><text:s text:c="2"/>}</text:p>
      <text:p text:style-name="P39"/>
      <text:p text:style-name="P40"><text:s text:c="2"/>/* ===== NOISE OVERLAY ===== */</text:p>
      <text:p text:style-name="P41"><text:s text:c="2"/>body::before {</text:p>
      <text:p text:style-name="P42"><text:s text:c="4"/>content: '';</text:p>
      <text:p text:style-name="P43"><text:s text:c="4"/>position: fixed;</text:p>
      <text:p text:style-name="P44"><text:s text:c="4"/>inset: 0;</text:p>
      <text:p text:style-name="P45"><text:s text:c="4"/>background-image: url("data:image/svg+xml,%3Csvg viewBox='0 0 256 256' xmlns='http://www.w3.org/2000/svg'%3E%3Cfilter id='n'%3E%3CfeTurbulence type='fractalNoise' baseFrequency='0.9' numOctaves='4' stitchTiles='stitch'/%3E%3C/filter%3E%3Crect width='100%25' height='100%25' filter='url(%23n)' opacity='0.04'/%3E%3C/svg%3E");</text:p>
      <text:p text:style-name="P46"><text:s text:c="4"/>opacity: 0.35;</text:p>
      <text:p text:style-name="P47"><text:s text:c="4"/>pointer-events: none;</text:p>
      <text:p text:style-name="P48"><text:s text:c="4"/>z-index: 0;</text:p>
      <text:p text:style-name="P49"><text:s text:c="2"/>}</text:p>
      <text:p text:style-name="P50"/>
      <text:p text:style-name="P51"><text:s text:c="2"/>/* ===== NAV ===== */</text:p>
      <text:p text:style-name="P52"><text:s text:c="2"/>nav {</text:p>
      <text:p text:style-name="P53"><text:s text:c="4"/>position: fixed;</text:p>
      <text:p text:style-name="P54"><text:s text:c="4"/>top: 0; left: 0; right: 0;</text:p>
      <text:p text:style-name="P55"><text:s text:c="4"/>z-index: 1000;</text:p>
      <text:p text:style-name="P56"><text:s text:c="4"/>display: flex;</text:p>
      <text:p text:style-name="P57"><text:s text:c="4"/>align-items: center;</text:p>
      <text:p text:style-name="P58"><text:s text:c="4"/>justify-content: space-between;</text:p>
      <text:p text:style-name="P59"><text:s text:c="4"/>padding: 0 5%;</text:p>
      <text:p text:style-name="P60"><text:s text:c="4"/>height: 72px;</text:p>
      <text:p text:style-name="P61"><text:s text:c="4"/>background: linear-gradient(180deg, rgba(6,14,8,0.98) 0%, rgba(6,14,8,0.85) 100%);</text:p>
      <text:p text:style-name="P62"><text:s text:c="4"/>backdrop-filter: blur(12px);</text:p>
      <text:p text:style-name="P63"><text:s text:c="4"/>border-bottom: 1px solid var(--border);</text:p>
      <text:p text:style-name="P64"><text:s text:c="2"/>}</text:p>
      <text:p text:style-name="P65"/>
      <text:p text:style-name="P66"><text:s text:c="2"/>.nav-logo {</text:p>
      <text:p text:style-name="P67"><text:s text:c="4"/>display: flex;</text:p>
      <text:p text:style-name="P68"><text:s text:c="4"/>align-items: center;</text:p>
      <text:p text:style-name="P69"><text:s text:c="4"/>gap: 12px;</text:p>
      <text:p text:style-name="P70"><text:s text:c="4"/>text-decoration: none;</text:p>
      <text:p text:style-name="P71"><text:s text:c="2"/>}</text:p>
      <text:p text:style-name="P72"/>
      <text:p text:style-name="P73"><text:s text:c="2"/>.logo-svg-wrap {</text:p>
      <text:soft-page-break/>
      <text:p text:style-name="P74"><text:s text:c="4"/>width: 44px;</text:p>
      <text:p text:style-name="P75"><text:s text:c="4"/>height: 44px;</text:p>
      <text:p text:style-name="P76"><text:s text:c="4"/>position: relative;</text:p>
      <text:p text:style-name="P77"><text:s text:c="2"/>}</text:p>
      <text:p text:style-name="P78"/>
      <text:p text:style-name="P79"><text:s text:c="2"/>.nav-brand {</text:p>
      <text:p text:style-name="P80"><text:s text:c="4"/>display: flex;</text:p>
      <text:p text:style-name="P81"><text:s text:c="4"/>flex-direction: column;</text:p>
      <text:p text:style-name="P82"><text:s text:c="4"/>line-height: 1;</text:p>
      <text:p text:style-name="P83"><text:s text:c="2"/>}</text:p>
      <text:p text:style-name="P84"/>
      <text:p text:style-name="P85"><text:s text:c="2"/>.nav-brand-name {</text:p>
      <text:p text:style-name="P86"><text:s text:c="4"/>font-family: 'Bebas Neue', sans-serif;</text:p>
      <text:p text:style-name="P87"><text:s text:c="4"/>font-size: 1.4rem;</text:p>
      <text:p text:style-name="P88"><text:s text:c="4"/>color: var(--white);</text:p>
      <text:p text:style-name="P89"><text:s text:c="4"/>letter-spacing: 2px;</text:p>
      <text:p text:style-name="P90"><text:s text:c="2"/>}</text:p>
      <text:p text:style-name="P91"/>
      <text:p text:style-name="P92"><text:s text:c="2"/>.nav-brand-sub {</text:p>
      <text:p text:style-name="P93"><text:s text:c="4"/>font-size: 0.62rem;</text:p>
      <text:p text:style-name="P94"><text:s text:c="4"/>color: var(--g300);</text:p>
      <text:p text:style-name="P95"><text:s text:c="4"/>letter-spacing: 1.5px;</text:p>
      <text:p text:style-name="P96"><text:s text:c="4"/>text-transform: uppercase;</text:p>
      <text:p text:style-name="P97"><text:s text:c="4"/>font-weight: 500;</text:p>
      <text:p text:style-name="P98"><text:s text:c="2"/>}</text:p>
      <text:p text:style-name="P99"/>
      <text:p text:style-name="P100"><text:s text:c="2"/>.nav-links {</text:p>
      <text:p text:style-name="P101"><text:s text:c="4"/>display: flex;</text:p>
      <text:p text:style-name="P102"><text:s text:c="4"/>gap: 2rem;</text:p>
      <text:p text:style-name="P103"><text:s text:c="4"/>list-style: none;</text:p>
      <text:p text:style-name="P104"><text:s text:c="2"/>}</text:p>
      <text:p text:style-name="P105"/>
      <text:p text:style-name="P106"><text:s text:c="2"/>.nav-links a {</text:p>
      <text:p text:style-name="P107"><text:s text:c="4"/>text-decoration: none;</text:p>
      <text:p text:style-name="P108"><text:s text:c="4"/>color: var(--offwhite);</text:p>
      <text:p text:style-name="P109"><text:s text:c="4"/>font-size: 0.85rem;</text:p>
      <text:p text:style-name="P110"><text:s text:c="4"/>font-weight: 500;</text:p>
      <text:p text:style-name="P111"><text:s text:c="4"/>letter-spacing: 0.5px;</text:p>
      <text:p text:style-name="P112"><text:s text:c="4"/>transition: color 0.2s;</text:p>
      <text:p text:style-name="P113"><text:s text:c="4"/>text-transform: uppercase;</text:p>
      <text:soft-page-break/>
      <text:p text:style-name="P114"><text:s text:c="2"/>}</text:p>
      <text:p text:style-name="P115"/>
      <text:p text:style-name="P116"><text:s text:c="2"/>.nav-links a:hover { color: var(--g300); }</text:p>
      <text:p text:style-name="P117"/>
      <text:p text:style-name="P118"><text:s text:c="2"/>.nav-cta {</text:p>
      <text:p text:style-name="P119"><text:s text:c="4"/>background: var(--g500);</text:p>
      <text:p text:style-name="P120"><text:s text:c="4"/>color: var(--white) !important;</text:p>
      <text:p text:style-name="P121"><text:s text:c="4"/>padding: 9px 20px !important;</text:p>
      <text:p text:style-name="P122"><text:s text:c="4"/>border-radius: 4px;</text:p>
      <text:p text:style-name="P123"><text:s text:c="4"/>transition: background 0.2s !important;</text:p>
      <text:p text:style-name="P124"><text:s text:c="2"/>}</text:p>
      <text:p text:style-name="P125"/>
      <text:p text:style-name="P126"><text:s text:c="2"/>.nav-cta:hover { background: var(--g400) !important; color: var(--white) !important; }</text:p>
      <text:p text:style-name="P127"/>
      <text:p text:style-name="P128"><text:s text:c="2"/>/* ===== HERO ===== */</text:p>
      <text:p text:style-name="P129"><text:s text:c="2"/>.hero {</text:p>
      <text:p text:style-name="P130"><text:s text:c="4"/>position: relative;</text:p>
      <text:p text:style-name="P131"><text:s text:c="4"/>min-height: 100vh;</text:p>
      <text:p text:style-name="P132"><text:s text:c="4"/>display: flex;</text:p>
      <text:p text:style-name="P133"><text:s text:c="4"/>align-items: center;</text:p>
      <text:p text:style-name="P134"><text:s text:c="4"/>justify-content: center;</text:p>
      <text:p text:style-name="P135"><text:s text:c="4"/>overflow: hidden;</text:p>
      <text:p text:style-name="P136"><text:s text:c="4"/>padding-top: 72px;</text:p>
      <text:p text:style-name="P137"><text:s text:c="2"/>}</text:p>
      <text:p text:style-name="P138"/>
      <text:p text:style-name="P139"><text:s text:c="2"/>.hero-bg {</text:p>
      <text:p text:style-name="P140"><text:s text:c="4"/>position: absolute;</text:p>
      <text:p text:style-name="P141"><text:s text:c="4"/>inset: 0;</text:p>
      <text:p text:style-name="P142"><text:s text:c="4"/>background: radial-gradient(ellipse 80% 60% at 50% 40%, rgba(45,106,63,0.28) 0%, transparent 70%),</text:p>
      <text:p text:style-name="P143"><text:s text:c="16"/>radial-gradient(ellipse 50% 40% at 20% 80%, rgba(29,58,32,0.4) 0%, transparent 60%),</text:p>
      <text:p text:style-name="P144"><text:s text:c="16"/>linear-gradient(180deg, var(--dark) 0%, var(--g900) 50%, var(--dark) 100%);</text:p>
      <text:p text:style-name="P145"><text:s text:c="2"/>}</text:p>
      <text:p text:style-name="P146"/>
      <text:p text:style-name="P147"><text:s text:c="2"/>.hero-grid {</text:p>
      <text:p text:style-name="P148"><text:s text:c="4"/>position: absolute;</text:p>
      <text:p text:style-name="P149"><text:s text:c="4"/>inset: 0;</text:p>
      <text:p text:style-name="P150"><text:s text:c="4"/>background-image:</text:p>
      <text:p text:style-name="P151"><text:s text:c="6"/>linear-gradient(rgba(45,106,63,0.07) 1px, transparent 1px),</text:p>
      <text:soft-page-break/>
      <text:p text:style-name="P152"><text:s text:c="6"/>linear-gradient(90deg, rgba(45,106,63,0.07) 1px, transparent 1px);</text:p>
      <text:p text:style-name="P153"><text:s text:c="4"/>background-size: 60px 60px;</text:p>
      <text:p text:style-name="P154"><text:s text:c="4"/>mask-image: radial-gradient(ellipse 70% 70% at 50% 50%, black 0%, transparent 80%);</text:p>
      <text:p text:style-name="P155"><text:s text:c="2"/>}</text:p>
      <text:p text:style-name="P156"/>
      <text:p text:style-name="P157"><text:s text:c="2"/>.waveform-hero {</text:p>
      <text:p text:style-name="P158"><text:s text:c="4"/>position: absolute;</text:p>
      <text:p text:style-name="P159"><text:s text:c="4"/>bottom: 0; left: 0; right: 0;</text:p>
      <text:p text:style-name="P160"><text:s text:c="4"/>height: 180px;</text:p>
      <text:p text:style-name="P161"><text:s text:c="4"/>opacity: 0.18;</text:p>
      <text:p text:style-name="P162"><text:s text:c="2"/>}</text:p>
      <text:p text:style-name="P163"/>
      <text:p text:style-name="P164"><text:s text:c="2"/>.hero-content {</text:p>
      <text:p text:style-name="P165"><text:s text:c="4"/>position: relative;</text:p>
      <text:p text:style-name="P166"><text:s text:c="4"/>z-index: 2;</text:p>
      <text:p text:style-name="P167"><text:s text:c="4"/>text-align: center;</text:p>
      <text:p text:style-name="P168"><text:s text:c="4"/>max-width: 900px;</text:p>
      <text:p text:style-name="P169"><text:s text:c="4"/>padding: 2rem 5%;</text:p>
      <text:p text:style-name="P170"><text:s text:c="4"/>animation: heroFadeUp 1s ease both;</text:p>
      <text:p text:style-name="P171"><text:s text:c="2"/>}</text:p>
      <text:p text:style-name="P172"/>
      <text:p text:style-name="P173"><text:s text:c="2"/>@keyframes heroFadeUp {</text:p>
      <text:p text:style-name="P174"><text:s text:c="4"/>from { opacity: 0; transform: translateY(40px); }</text:p>
      <text:p text:style-name="P175"><text:s text:c="4"/>to { opacity: 1; transform: translateY(0); }</text:p>
      <text:p text:style-name="P176"><text:s text:c="2"/>}</text:p>
      <text:p text:style-name="P177"/>
      <text:p text:style-name="P178"><text:s text:c="2"/>.hero-badge {</text:p>
      <text:p text:style-name="P179"><text:s text:c="4"/>display: inline-flex;</text:p>
      <text:p text:style-name="P180"><text:s text:c="4"/>align-items: center;</text:p>
      <text:p text:style-name="P181"><text:s text:c="4"/>gap: 8px;</text:p>
      <text:p text:style-name="P182"><text:s text:c="4"/>background: rgba(45,106,63,0.25);</text:p>
      <text:p text:style-name="P183"><text:s text:c="4"/>border: 1px solid rgba(82,179,107,0.35);</text:p>
      <text:p text:style-name="P184"><text:s text:c="4"/>padding: 6px 16px;</text:p>
      <text:p text:style-name="P185"><text:s text:c="4"/>border-radius: 100px;</text:p>
      <text:p text:style-name="P186"><text:s text:c="4"/>font-size: 0.78rem;</text:p>
      <text:p text:style-name="P187"><text:s text:c="4"/>letter-spacing: 2px;</text:p>
      <text:p text:style-name="P188"><text:s text:c="4"/>text-transform: uppercase;</text:p>
      <text:p text:style-name="P189"><text:s text:c="4"/>color: var(--g200);</text:p>
      <text:p text:style-name="P190"><text:s text:c="4"/>margin-bottom: 1.5rem;</text:p>
      <text:p text:style-name="P191"><text:s text:c="4"/>font-weight: 500;</text:p>
      <text:soft-page-break/>
      <text:p text:style-name="P192"><text:s text:c="2"/>}</text:p>
      <text:p text:style-name="P193"/>
      <text:p text:style-name="P194"><text:s text:c="2"/>.hero-badge-dot {</text:p>
      <text:p text:style-name="P195"><text:s text:c="4"/>width: 6px; height: 6px;</text:p>
      <text:p text:style-name="P196"><text:s text:c="4"/>background: var(--g300);</text:p>
      <text:p text:style-name="P197"><text:s text:c="4"/>border-radius: 50%;</text:p>
      <text:p text:style-name="P198"><text:s text:c="4"/>box-shadow: 0 0 8px var(--g300);</text:p>
      <text:p text:style-name="P199"><text:s text:c="4"/>animation: pulse 2s infinite;</text:p>
      <text:p text:style-name="P200"><text:s text:c="2"/>}</text:p>
      <text:p text:style-name="P201"/>
      <text:p text:style-name="P202"><text:s text:c="2"/>@keyframes pulse {</text:p>
      <text:p text:style-name="P203"><text:s text:c="4"/>0%, 100% { opacity: 1; transform: scale(1); }</text:p>
      <text:p text:style-name="P204"><text:s text:c="4"/>50% { opacity: 0.5; transform: scale(0.7); }</text:p>
      <text:p text:style-name="P205"><text:s text:c="2"/>}</text:p>
      <text:p text:style-name="P206"/>
      <text:p text:style-name="P207"><text:s text:c="2"/>.hero h1 {</text:p>
      <text:p text:style-name="P208"><text:s text:c="4"/>font-family: 'Bebas Neue', sans-serif;</text:p>
      <text:p text:style-name="P209"><text:s text:c="4"/>font-size: clamp(3rem, 8vw, 6.5rem);</text:p>
      <text:p text:style-name="P210"><text:s text:c="4"/>line-height: 0.95;</text:p>
      <text:p text:style-name="P211"><text:s text:c="4"/>letter-spacing: 3px;</text:p>
      <text:p text:style-name="P212"><text:s text:c="4"/>color: var(--white);</text:p>
      <text:p text:style-name="P213"><text:s text:c="4"/>margin-bottom: 0.5rem;</text:p>
      <text:p text:style-name="P214"><text:s text:c="2"/>}</text:p>
      <text:p text:style-name="P215"/>
      <text:p text:style-name="P216"><text:s text:c="2"/>.hero h1 span {</text:p>
      <text:p text:style-name="P217"><text:s text:c="4"/>color: var(--g300);</text:p>
      <text:p text:style-name="P218"><text:s text:c="4"/>text-shadow: 0 0 40px rgba(82,179,107,0.5);</text:p>
      <text:p text:style-name="P219"><text:s text:c="2"/>}</text:p>
      <text:p text:style-name="P220"/>
      <text:p text:style-name="P221"><text:s text:c="2"/>.hero-subtitle {</text:p>
      <text:p text:style-name="P222"><text:s text:c="4"/>font-family: 'Barlow Condensed', sans-serif;</text:p>
      <text:p text:style-name="P223"><text:s text:c="4"/>font-size: clamp(1rem, 2.5vw, 1.35rem);</text:p>
      <text:p text:style-name="P224"><text:s text:c="4"/>color: var(--offwhite);</text:p>
      <text:p text:style-name="P225"><text:s text:c="4"/>letter-spacing: 4px;</text:p>
      <text:p text:style-name="P226"><text:s text:c="4"/>text-transform: uppercase;</text:p>
      <text:p text:style-name="P227"><text:s text:c="4"/>margin-bottom: 1.5rem;</text:p>
      <text:p text:style-name="P228"><text:s text:c="4"/>font-weight: 400;</text:p>
      <text:p text:style-name="P229"><text:s text:c="2"/>}</text:p>
      <text:p text:style-name="P230"/>
      <text:p text:style-name="P231"><text:s text:c="2"/>.hero-desc {</text:p>
      <text:soft-page-break/>
      <text:p text:style-name="P232"><text:s text:c="4"/>font-size: 1.05rem;</text:p>
      <text:p text:style-name="P233"><text:s text:c="4"/>color: var(--muted);</text:p>
      <text:p text:style-name="P234"><text:s text:c="4"/>max-width: 600px;</text:p>
      <text:p text:style-name="P235"><text:s text:c="4"/>margin: 0 auto 2.5rem;</text:p>
      <text:p text:style-name="P236"><text:s text:c="4"/>line-height: 1.7;</text:p>
      <text:p text:style-name="P237"><text:s text:c="2"/>}</text:p>
      <text:p text:style-name="P238"/>
      <text:p text:style-name="P239"><text:s text:c="2"/>.hero-checks {</text:p>
      <text:p text:style-name="P240"><text:s text:c="4"/>display: flex;</text:p>
      <text:p text:style-name="P241"><text:s text:c="4"/>flex-wrap: wrap;</text:p>
      <text:p text:style-name="P242"><text:s text:c="4"/>justify-content: center;</text:p>
      <text:p text:style-name="P243"><text:s text:c="4"/>gap: 12px 24px;</text:p>
      <text:p text:style-name="P244"><text:s text:c="4"/>margin-bottom: 2.5rem;</text:p>
      <text:p text:style-name="P245"><text:s text:c="2"/>}</text:p>
      <text:p text:style-name="P246"/>
      <text:p text:style-name="P247"><text:s text:c="2"/>.hero-check {</text:p>
      <text:p text:style-name="P248"><text:s text:c="4"/>display: flex;</text:p>
      <text:p text:style-name="P249"><text:s text:c="4"/>align-items: center;</text:p>
      <text:p text:style-name="P250"><text:s text:c="4"/>gap: 8px;</text:p>
      <text:p text:style-name="P251"><text:s text:c="4"/>font-size: 0.88rem;</text:p>
      <text:p text:style-name="P252"><text:s text:c="4"/>color: var(--offwhite);</text:p>
      <text:p text:style-name="P253"><text:s text:c="4"/>font-weight: 500;</text:p>
      <text:p text:style-name="P254"><text:s text:c="2"/>}</text:p>
      <text:p text:style-name="P255"/>
      <text:p text:style-name="P256"><text:s text:c="2"/>.hero-check-icon {</text:p>
      <text:p text:style-name="P257"><text:s text:c="4"/>width: 18px; height: 18px;</text:p>
      <text:p text:style-name="P258"><text:s text:c="4"/>background: var(--g500);</text:p>
      <text:p text:style-name="P259"><text:s text:c="4"/>border-radius: 50%;</text:p>
      <text:p text:style-name="P260"><text:s text:c="4"/>display: flex;</text:p>
      <text:p text:style-name="P261"><text:s text:c="4"/>align-items: center;</text:p>
      <text:p text:style-name="P262"><text:s text:c="4"/>justify-content: center;</text:p>
      <text:p text:style-name="P263"><text:s text:c="4"/>flex-shrink: 0;</text:p>
      <text:p text:style-name="P264"><text:s text:c="2"/>}</text:p>
      <text:p text:style-name="P265"/>
      <text:p text:style-name="P266"><text:s text:c="2"/>.hero-check-icon svg { width: 10px; height: 10px; }</text:p>
      <text:p text:style-name="P267"/>
      <text:p text:style-name="P268"><text:s text:c="2"/>.hero-btns {</text:p>
      <text:p text:style-name="P269"><text:s text:c="4"/>display: flex;</text:p>
      <text:p text:style-name="P270"><text:s text:c="4"/>gap: 14px;</text:p>
      <text:p text:style-name="P271"><text:s text:c="4"/>justify-content: center;</text:p>
      <text:soft-page-break/>
      <text:p text:style-name="P272"><text:s text:c="4"/>flex-wrap: wrap;</text:p>
      <text:p text:style-name="P273"><text:s text:c="2"/>}</text:p>
      <text:p text:style-name="P274"/>
      <text:p text:style-name="P275"><text:s text:c="2"/>.btn-primary {</text:p>
      <text:p text:style-name="P276"><text:s text:c="4"/>background: linear-gradient(135deg, var(--g500), var(--g400));</text:p>
      <text:p text:style-name="P277"><text:s text:c="4"/>color: var(--white);</text:p>
      <text:p text:style-name="P278"><text:s text:c="4"/>padding: 15px 32px;</text:p>
      <text:p text:style-name="P279"><text:s text:c="4"/>border-radius: 4px;</text:p>
      <text:p text:style-name="P280"><text:s text:c="4"/>font-family: 'Barlow Condensed', sans-serif;</text:p>
      <text:p text:style-name="P281"><text:s text:c="4"/>font-size: 1rem;</text:p>
      <text:p text:style-name="P282"><text:s text:c="4"/>font-weight: 700;</text:p>
      <text:p text:style-name="P283"><text:s text:c="4"/>letter-spacing: 2px;</text:p>
      <text:p text:style-name="P284"><text:s text:c="4"/>text-transform: uppercase;</text:p>
      <text:p text:style-name="P285"><text:s text:c="4"/>text-decoration: none;</text:p>
      <text:p text:style-name="P286"><text:s text:c="4"/>border: none;</text:p>
      <text:p text:style-name="P287"><text:s text:c="4"/>cursor: pointer;</text:p>
      <text:p text:style-name="P288"><text:s text:c="4"/>transition: all 0.25s;</text:p>
      <text:p text:style-name="P289"><text:s text:c="4"/>box-shadow: 0 4px 24px rgba(45,106,63,0.45);</text:p>
      <text:p text:style-name="P290"><text:s text:c="2"/>}</text:p>
      <text:p text:style-name="P291"/>
      <text:p text:style-name="P292"><text:s text:c="2"/>.btn-primary:hover {</text:p>
      <text:p text:style-name="P293"><text:s text:c="4"/>transform: translateY(-2px);</text:p>
      <text:p text:style-name="P294"><text:s text:c="4"/>box-shadow: 0 8px 32px rgba(45,106,63,0.65);</text:p>
      <text:p text:style-name="P295"><text:s text:c="4"/>background: linear-gradient(135deg, var(--g400), var(--g300));</text:p>
      <text:p text:style-name="P296"><text:s text:c="2"/>}</text:p>
      <text:p text:style-name="P297"/>
      <text:p text:style-name="P298"><text:s text:c="2"/>.btn-outline {</text:p>
      <text:p text:style-name="P299"><text:s text:c="4"/>background: transparent;</text:p>
      <text:p text:style-name="P300"><text:s text:c="4"/>color: var(--g200);</text:p>
      <text:p text:style-name="P301"><text:s text:c="4"/>padding: 15px 32px;</text:p>
      <text:p text:style-name="P302"><text:s text:c="4"/>border-radius: 4px;</text:p>
      <text:p text:style-name="P303"><text:s text:c="4"/>font-family: 'Barlow Condensed', sans-serif;</text:p>
      <text:p text:style-name="P304"><text:s text:c="4"/>font-size: 1rem;</text:p>
      <text:p text:style-name="P305"><text:s text:c="4"/>font-weight: 700;</text:p>
      <text:p text:style-name="P306"><text:s text:c="4"/>letter-spacing: 2px;</text:p>
      <text:p text:style-name="P307"><text:s text:c="4"/>text-transform: uppercase;</text:p>
      <text:p text:style-name="P308"><text:s text:c="4"/>text-decoration: none;</text:p>
      <text:p text:style-name="P309"><text:s text:c="4"/>border: 1.5px solid var(--g500);</text:p>
      <text:p text:style-name="P310"><text:s text:c="4"/>cursor: pointer;</text:p>
      <text:p text:style-name="P311"><text:s text:c="4"/>transition: all 0.25s;</text:p>
      <text:soft-page-break/>
      <text:p text:style-name="P312"><text:s text:c="2"/>}</text:p>
      <text:p text:style-name="P313"/>
      <text:p text:style-name="P314"><text:s text:c="2"/>.btn-outline:hover {</text:p>
      <text:p text:style-name="P315"><text:s text:c="4"/>background: rgba(45,106,63,0.15);</text:p>
      <text:p text:style-name="P316"><text:s text:c="4"/>border-color: var(--g300);</text:p>
      <text:p text:style-name="P317"><text:s text:c="4"/>transform: translateY(-2px);</text:p>
      <text:p text:style-name="P318"><text:s text:c="2"/>}</text:p>
      <text:p text:style-name="P319"/>
      <text:p text:style-name="P320"><text:s text:c="2"/>/* ===== STATS BAR ===== */</text:p>
      <text:p text:style-name="P321"><text:s text:c="2"/>.stats-bar {</text:p>
      <text:p text:style-name="P322"><text:s text:c="4"/>position: relative;</text:p>
      <text:p text:style-name="P323"><text:s text:c="4"/>z-index: 2;</text:p>
      <text:p text:style-name="P324"><text:s text:c="4"/>background: rgba(13,31,16,0.9);</text:p>
      <text:p text:style-name="P325"><text:s text:c="4"/>border-top: 1px solid var(--border);</text:p>
      <text:p text:style-name="P326"><text:s text:c="4"/>border-bottom: 1px solid var(--border);</text:p>
      <text:p text:style-name="P327"><text:s text:c="4"/>padding: 28px 5%;</text:p>
      <text:p text:style-name="P328"><text:s text:c="4"/>display: flex;</text:p>
      <text:p text:style-name="P329"><text:s text:c="4"/>justify-content: center;</text:p>
      <text:p text:style-name="P330"><text:s text:c="4"/>gap: 0;</text:p>
      <text:p text:style-name="P331"><text:s text:c="4"/>flex-wrap: wrap;</text:p>
      <text:p text:style-name="P332"><text:s text:c="4"/>backdrop-filter: blur(8px);</text:p>
      <text:p text:style-name="P333"><text:s text:c="2"/>}</text:p>
      <text:p text:style-name="P334"/>
      <text:p text:style-name="P335"><text:s text:c="2"/>.stat-item {</text:p>
      <text:p text:style-name="P336"><text:s text:c="4"/>text-align: center;</text:p>
      <text:p text:style-name="P337"><text:s text:c="4"/>padding: 8px 48px;</text:p>
      <text:p text:style-name="P338"><text:s text:c="4"/>border-right: 1px solid var(--border);</text:p>
      <text:p text:style-name="P339"><text:s text:c="4"/>flex: 1;</text:p>
      <text:p text:style-name="P340"><text:s text:c="4"/>min-width: 150px;</text:p>
      <text:p text:style-name="P341"><text:s text:c="2"/>}</text:p>
      <text:p text:style-name="P342"/>
      <text:p text:style-name="P343"><text:s text:c="2"/>.stat-item:last-child { border-right: none; }</text:p>
      <text:p text:style-name="P344"/>
      <text:p text:style-name="P345"><text:s text:c="2"/>.stat-num {</text:p>
      <text:p text:style-name="P346"><text:s text:c="4"/>font-family: 'Bebas Neue', sans-serif;</text:p>
      <text:p text:style-name="P347"><text:s text:c="4"/>font-size: 2.2rem;</text:p>
      <text:p text:style-name="P348"><text:s text:c="4"/>color: var(--g300);</text:p>
      <text:p text:style-name="P349"><text:s text:c="4"/>letter-spacing: 2px;</text:p>
      <text:p text:style-name="P350"><text:s text:c="4"/>line-height: 1;</text:p>
      <text:p text:style-name="P351"><text:s text:c="4"/>display: block;</text:p>
      <text:soft-page-break/>
      <text:p text:style-name="P352"><text:s text:c="4"/>text-shadow: 0 0 20px rgba(82,179,107,0.4);</text:p>
      <text:p text:style-name="P353"><text:s text:c="2"/>}</text:p>
      <text:p text:style-name="P354"/>
      <text:p text:style-name="P355"><text:s text:c="2"/>.stat-label {</text:p>
      <text:p text:style-name="P356"><text:s text:c="4"/>font-size: 0.72rem;</text:p>
      <text:p text:style-name="P357"><text:s text:c="4"/>text-transform: uppercase;</text:p>
      <text:p text:style-name="P358"><text:s text:c="4"/>letter-spacing: 2px;</text:p>
      <text:p text:style-name="P359"><text:s text:c="4"/>color: var(--muted);</text:p>
      <text:p text:style-name="P360"><text:s text:c="4"/>font-weight: 500;</text:p>
      <text:p text:style-name="P361"><text:s text:c="4"/>margin-top: 4px;</text:p>
      <text:p text:style-name="P362"><text:s text:c="2"/>}</text:p>
      <text:p text:style-name="P363"/>
      <text:p text:style-name="P364"><text:s text:c="2"/>/* ===== SECTION COMMONS ===== */</text:p>
      <text:p text:style-name="P365"><text:s text:c="2"/>section { position: relative; z-index: 1; }</text:p>
      <text:p text:style-name="P366"/>
      <text:p text:style-name="P367"><text:s text:c="2"/>.section-pad { padding: 100px 5%; }</text:p>
      <text:p text:style-name="P368"/>
      <text:p text:style-name="P369"><text:s text:c="2"/>.section-header {</text:p>
      <text:p text:style-name="P370"><text:s text:c="4"/>text-align: center;</text:p>
      <text:p text:style-name="P371"><text:s text:c="4"/>margin-bottom: 60px;</text:p>
      <text:p text:style-name="P372"><text:s text:c="2"/>}</text:p>
      <text:p text:style-name="P373"/>
      <text:p text:style-name="P374"><text:s text:c="2"/>.section-tag {</text:p>
      <text:p text:style-name="P375"><text:s text:c="4"/>font-family: 'Barlow Condensed', sans-serif;</text:p>
      <text:p text:style-name="P376"><text:s text:c="4"/>font-size: 0.78rem;</text:p>
      <text:p text:style-name="P377"><text:s text:c="4"/>letter-spacing: 4px;</text:p>
      <text:p text:style-name="P378"><text:s text:c="4"/>text-transform: uppercase;</text:p>
      <text:p text:style-name="P379"><text:s text:c="4"/>color: var(--g300);</text:p>
      <text:p text:style-name="P380"><text:s text:c="4"/>font-weight: 600;</text:p>
      <text:p text:style-name="P381"><text:s text:c="4"/>display: block;</text:p>
      <text:p text:style-name="P382"><text:s text:c="4"/>margin-bottom: 12px;</text:p>
      <text:p text:style-name="P383"><text:s text:c="2"/>}</text:p>
      <text:p text:style-name="P384"/>
      <text:p text:style-name="P385"><text:s text:c="2"/>.section-title {</text:p>
      <text:p text:style-name="P386"><text:s text:c="4"/>font-family: 'Bebas Neue', sans-serif;</text:p>
      <text:p text:style-name="P387"><text:s text:c="4"/>font-size: clamp(2.2rem, 5vw, 3.8rem);</text:p>
      <text:p text:style-name="P388"><text:s text:c="4"/>letter-spacing: 2px;</text:p>
      <text:p text:style-name="P389"><text:s text:c="4"/>color: var(--white);</text:p>
      <text:p text:style-name="P390"><text:s text:c="4"/>line-height: 1;</text:p>
      <text:p text:style-name="P391"><text:s text:c="2"/>}</text:p>
      <text:p text:style-name="P392"/>
      <text:p text:style-name="P393"><text:s text:c="2"/>.section-title span { color: var(--g300); }</text:p>
      <text:p text:style-name="P394"/>
      <text:p text:style-name="P395"><text:s text:c="2"/>.section-line {</text:p>
      <text:p text:style-name="P396"><text:s text:c="4"/>width: 60px; height: 3px;</text:p>
      <text:p text:style-name="P397"><text:s text:c="4"/>background: linear-gradient(90deg, var(--g500), var(--g300));</text:p>
      <text:p text:style-name="P398"><text:s text:c="4"/>margin: 18px auto 0;</text:p>
      <text:p text:style-name="P399"><text:s text:c="4"/>border-radius: 2px;</text:p>
      <text:p text:style-name="P400"><text:s text:c="2"/>}</text:p>
      <text:p text:style-name="P401"/>
      <text:p text:style-name="P402"><text:s text:c="2"/>.section-desc {</text:p>
      <text:p text:style-name="P403"><text:s text:c="4"/>color: var(--muted);</text:p>
      <text:p text:style-name="P404"><text:s text:c="4"/>font-size: 1rem;</text:p>
      <text:p text:style-name="P405"><text:s text:c="4"/>max-width: 520px;</text:p>
      <text:p text:style-name="P406"><text:s text:c="4"/>margin: 16px auto 0;</text:p>
      <text:p text:style-name="P407"><text:s text:c="4"/>line-height: 1.7;</text:p>
      <text:p text:style-name="P408"><text:s text:c="2"/>}</text:p>
      <text:p text:style-name="P409"/>
      <text:p text:style-name="P410"><text:s text:c="2"/>/* ===== ABOUT ===== */</text:p>
      <text:p text:style-name="P411"><text:s text:c="2"/>.about { background: linear-gradient(180deg, var(--dark) 0%, var(--g900) 100%); }</text:p>
      <text:p text:style-name="P412"/>
      <text:p text:style-name="P413"><text:s text:c="2"/>.about-inner {</text:p>
      <text:p text:style-name="P414"><text:s text:c="4"/>display: grid;</text:p>
      <text:p text:style-name="P415"><text:s text:c="4"/>grid-template-columns: 1fr 1fr;</text:p>
      <text:p text:style-name="P416"><text:s text:c="4"/>gap: 80px;</text:p>
      <text:p text:style-name="P417"><text:s text:c="4"/>align-items: center;</text:p>
      <text:p text:style-name="P418"><text:s text:c="4"/>max-width: 1200px;</text:p>
      <text:p text:style-name="P419"><text:s text:c="4"/>margin: 0 auto;</text:p>
      <text:p text:style-name="P420"><text:s text:c="2"/>}</text:p>
      <text:p text:style-name="P421"/>
      <text:p text:style-name="P422"><text:s text:c="2"/>.about-text h2 {</text:p>
      <text:p text:style-name="P423"><text:s text:c="4"/>font-family: 'Bebas Neue', sans-serif;</text:p>
      <text:p text:style-name="P424"><text:s text:c="4"/>font-size: clamp(2rem, 4vw, 3rem);</text:p>
      <text:p text:style-name="P425"><text:s text:c="4"/>letter-spacing: 2px;</text:p>
      <text:p text:style-name="P426"><text:s text:c="4"/>line-height: 1.05;</text:p>
      <text:p text:style-name="P427"><text:s text:c="4"/>color: var(--white);</text:p>
      <text:p text:style-name="P428"><text:s text:c="4"/>margin-bottom: 20px;</text:p>
      <text:p text:style-name="P429"><text:s text:c="2"/>}</text:p>
      <text:p text:style-name="P430"/>
      <text:p text:style-name="P431"><text:s text:c="2"/>.about-text h2 em {</text:p>
      <text:soft-page-break/>
      <text:p text:style-name="P432"><text:s text:c="4"/>font-style: normal;</text:p>
      <text:p text:style-name="P433"><text:s text:c="4"/>color: var(--g300);</text:p>
      <text:p text:style-name="P434"><text:s text:c="2"/>}</text:p>
      <text:p text:style-name="P435"/>
      <text:p text:style-name="P436"><text:s text:c="2"/>.about-text p {</text:p>
      <text:p text:style-name="P437"><text:s text:c="4"/>color: var(--muted);</text:p>
      <text:p text:style-name="P438"><text:s text:c="4"/>line-height: 1.8;</text:p>
      <text:p text:style-name="P439"><text:s text:c="4"/>font-size: 1rem;</text:p>
      <text:p text:style-name="P440"><text:s text:c="4"/>margin-bottom: 28px;</text:p>
      <text:p text:style-name="P441"><text:s text:c="2"/>}</text:p>
      <text:p text:style-name="P442"/>
      <text:p text:style-name="P443"><text:s text:c="2"/>.about-visual {</text:p>
      <text:p text:style-name="P444"><text:s text:c="4"/>position: relative;</text:p>
      <text:p text:style-name="P445"><text:s text:c="2"/>}</text:p>
      <text:p text:style-name="P446"/>
      <text:p text:style-name="P447"><text:s text:c="2"/>.about-card {</text:p>
      <text:p text:style-name="P448"><text:s text:c="4"/>background: var(--card);</text:p>
      <text:p text:style-name="P449"><text:s text:c="4"/>border: 1px solid rgba(45,106,63,0.25);</text:p>
      <text:p text:style-name="P450"><text:s text:c="4"/>border-radius: 8px;</text:p>
      <text:p text:style-name="P451"><text:s text:c="4"/>padding: 40px;</text:p>
      <text:p text:style-name="P452"><text:s text:c="4"/>position: relative;</text:p>
      <text:p text:style-name="P453"><text:s text:c="4"/>overflow: hidden;</text:p>
      <text:p text:style-name="P454"><text:s text:c="2"/>}</text:p>
      <text:p text:style-name="P455"/>
      <text:p text:style-name="P456"><text:s text:c="2"/>.about-card::before {</text:p>
      <text:p text:style-name="P457"><text:s text:c="4"/>content: '';</text:p>
      <text:p text:style-name="P458"><text:s text:c="4"/>position: absolute;</text:p>
      <text:p text:style-name="P459"><text:s text:c="4"/>top: -50%;</text:p>
      <text:p text:style-name="P460"><text:s text:c="4"/>left: -50%;</text:p>
      <text:p text:style-name="P461"><text:s text:c="4"/>width: 200%;</text:p>
      <text:p text:style-name="P462"><text:s text:c="4"/>height: 200%;</text:p>
      <text:p text:style-name="P463"><text:s text:c="4"/>background: radial-gradient(ellipse at center, rgba(45,106,63,0.12) 0%, transparent 60%);</text:p>
      <text:p text:style-name="P464"><text:s text:c="4"/>pointer-events: none;</text:p>
      <text:p text:style-name="P465"><text:s text:c="2"/>}</text:p>
      <text:p text:style-name="P466"/>
      <text:p text:style-name="P467"><text:s text:c="2"/>.about-card-title {</text:p>
      <text:p text:style-name="P468"><text:s text:c="4"/>font-family: 'Bebas Neue', sans-serif;</text:p>
      <text:p text:style-name="P469"><text:s text:c="4"/>font-size: 1.5rem;</text:p>
      <text:p text:style-name="P470"><text:s text:c="4"/>letter-spacing: 2px;</text:p>
      <text:soft-page-break/>
      <text:p text:style-name="P471"><text:s text:c="4"/>color: var(--g300);</text:p>
      <text:p text:style-name="P472"><text:s text:c="4"/>margin-bottom: 24px;</text:p>
      <text:p text:style-name="P473"><text:s text:c="2"/>}</text:p>
      <text:p text:style-name="P474"/>
      <text:p text:style-name="P475"><text:s text:c="2"/>.about-feat {</text:p>
      <text:p text:style-name="P476"><text:s text:c="4"/>display: flex;</text:p>
      <text:p text:style-name="P477"><text:s text:c="4"/>gap: 16px;</text:p>
      <text:p text:style-name="P478"><text:s text:c="4"/>margin-bottom: 18px;</text:p>
      <text:p text:style-name="P479"><text:s text:c="4"/>align-items: flex-start;</text:p>
      <text:p text:style-name="P480"><text:s text:c="2"/>}</text:p>
      <text:p text:style-name="P481"/>
      <text:p text:style-name="P482"><text:s text:c="2"/>.about-feat-icon {</text:p>
      <text:p text:style-name="P483"><text:s text:c="4"/>width: 38px; height: 38px;</text:p>
      <text:p text:style-name="P484"><text:s text:c="4"/>background: rgba(45,106,63,0.25);</text:p>
      <text:p text:style-name="P485"><text:s text:c="4"/>border: 1px solid rgba(45,106,63,0.4);</text:p>
      <text:p text:style-name="P486"><text:s text:c="4"/>border-radius: 6px;</text:p>
      <text:p text:style-name="P487"><text:s text:c="4"/>display: flex;</text:p>
      <text:p text:style-name="P488"><text:s text:c="4"/>align-items: center;</text:p>
      <text:p text:style-name="P489"><text:s text:c="4"/>justify-content: center;</text:p>
      <text:p text:style-name="P490"><text:s text:c="4"/>flex-shrink: 0;</text:p>
      <text:p text:style-name="P491"><text:s text:c="2"/>}</text:p>
      <text:p text:style-name="P492"/>
      <text:p text:style-name="P493"><text:s text:c="2"/>.about-feat-icon svg { width: 18px; height: 18px; color: var(--g300); fill: var(--g300); }</text:p>
      <text:p text:style-name="P494"/>
      <text:p text:style-name="P495"><text:s text:c="2"/>.about-feat-text h4 {</text:p>
      <text:p text:style-name="P496"><text:s text:c="4"/>font-family: 'Barlow Condensed', sans-serif;</text:p>
      <text:p text:style-name="P497"><text:s text:c="4"/>font-size: 0.95rem;</text:p>
      <text:p text:style-name="P498"><text:s text:c="4"/>font-weight: 700;</text:p>
      <text:p text:style-name="P499"><text:s text:c="4"/>letter-spacing: 1px;</text:p>
      <text:p text:style-name="P500"><text:s text:c="4"/>text-transform: uppercase;</text:p>
      <text:p text:style-name="P501"><text:s text:c="4"/>color: var(--white);</text:p>
      <text:p text:style-name="P502"><text:s text:c="4"/>margin-bottom: 2px;</text:p>
      <text:p text:style-name="P503"><text:s text:c="2"/>}</text:p>
      <text:p text:style-name="P504"/>
      <text:p text:style-name="P505"><text:s text:c="2"/>.about-feat-text p {</text:p>
      <text:p text:style-name="P506"><text:s text:c="4"/>font-size: 0.82rem;</text:p>
      <text:p text:style-name="P507"><text:s text:c="4"/>color: var(--muted);</text:p>
      <text:p text:style-name="P508"><text:s text:c="4"/>line-height: 1.5;</text:p>
      <text:p text:style-name="P509"><text:s text:c="4"/>margin: 0;</text:p>
      <text:p text:style-name="P510"><text:s text:c="2"/>}</text:p>
      <text:p text:style-name="P511"/>
      <text:p text:style-name="P512"><text:s text:c="2"/>/* ===== SERVICES ===== */</text:p>
      <text:p text:style-name="P513"><text:s text:c="2"/>.services { background: var(--g900); }</text:p>
      <text:p text:style-name="P514"/>
      <text:p text:style-name="P515"><text:s text:c="2"/>.services-grid {</text:p>
      <text:p text:style-name="P516"><text:s text:c="4"/>display: grid;</text:p>
      <text:p text:style-name="P517"><text:s text:c="4"/>grid-template-columns: repeat(auto-fit, minmax(300px, 1fr));</text:p>
      <text:p text:style-name="P518"><text:s text:c="4"/>gap: 24px;</text:p>
      <text:p text:style-name="P519"><text:s text:c="4"/>max-width: 1200px;</text:p>
      <text:p text:style-name="P520"><text:s text:c="4"/>margin: 0 auto;</text:p>
      <text:p text:style-name="P521"><text:s text:c="2"/>}</text:p>
      <text:p text:style-name="P522"/>
      <text:p text:style-name="P523"><text:s text:c="2"/>.service-card {</text:p>
      <text:p text:style-name="P524"><text:s text:c="4"/>background: var(--card);</text:p>
      <text:p text:style-name="P525"><text:s text:c="4"/>border: 1px solid rgba(45,106,63,0.2);</text:p>
      <text:p text:style-name="P526"><text:s text:c="4"/>border-radius: 8px;</text:p>
      <text:p text:style-name="P527"><text:s text:c="4"/>padding: 36px 32px;</text:p>
      <text:p text:style-name="P528"><text:s text:c="4"/>position: relative;</text:p>
      <text:p text:style-name="P529"><text:s text:c="4"/>overflow: hidden;</text:p>
      <text:p text:style-name="P530"><text:s text:c="4"/>transition: all 0.35s cubic-bezier(0.2,0,0,1);</text:p>
      <text:p text:style-name="P531"><text:s text:c="4"/>cursor: pointer;</text:p>
      <text:p text:style-name="P532"><text:s text:c="2"/>}</text:p>
      <text:p text:style-name="P533"/>
      <text:p text:style-name="P534"><text:s text:c="2"/>.service-card::after {</text:p>
      <text:p text:style-name="P535"><text:s text:c="4"/>content: '';</text:p>
      <text:p text:style-name="P536"><text:s text:c="4"/>position: absolute;</text:p>
      <text:p text:style-name="P537"><text:s text:c="4"/>bottom: 0; left: 0; right: 0;</text:p>
      <text:p text:style-name="P538"><text:s text:c="4"/>height: 3px;</text:p>
      <text:p text:style-name="P539"><text:s text:c="4"/>background: linear-gradient(90deg, var(--g600), var(--g300));</text:p>
      <text:p text:style-name="P540"><text:s text:c="4"/>transform: scaleX(0);</text:p>
      <text:p text:style-name="P541"><text:s text:c="4"/>transform-origin: left;</text:p>
      <text:p text:style-name="P542"><text:s text:c="4"/>transition: transform 0.35s;</text:p>
      <text:p text:style-name="P543"><text:s text:c="2"/>}</text:p>
      <text:p text:style-name="P544"/>
      <text:p text:style-name="P545"><text:s text:c="2"/>.service-card:hover {</text:p>
      <text:p text:style-name="P546"><text:s text:c="4"/>border-color: rgba(45,106,63,0.5);</text:p>
      <text:p text:style-name="P547"><text:s text:c="4"/>transform: translateY(-6px);</text:p>
      <text:p text:style-name="P548"><text:s text:c="4"/>box-shadow: 0 20px 60px rgba(0,0,0,0.4), 0 0 40px rgba(45,106,63,0.15);</text:p>
      <text:p text:style-name="P549"><text:s text:c="2"/>}</text:p>
      <text:p text:style-name="P550"/>
      <text:soft-page-break/>
      <text:p text:style-name="P551"><text:s text:c="2"/>.service-card:hover::after { transform: scaleX(1); }</text:p>
      <text:p text:style-name="P552"/>
      <text:p text:style-name="P553"><text:s text:c="2"/>.service-icon {</text:p>
      <text:p text:style-name="P554"><text:s text:c="4"/>width: 56px; height: 56px;</text:p>
      <text:p text:style-name="P555"><text:s text:c="4"/>background: rgba(45,106,63,0.2);</text:p>
      <text:p text:style-name="P556"><text:s text:c="4"/>border: 1px solid rgba(45,106,63,0.35);</text:p>
      <text:p text:style-name="P557"><text:s text:c="4"/>border-radius: 10px;</text:p>
      <text:p text:style-name="P558"><text:s text:c="4"/>display: flex;</text:p>
      <text:p text:style-name="P559"><text:s text:c="4"/>align-items: center;</text:p>
      <text:p text:style-name="P560"><text:s text:c="4"/>justify-content: center;</text:p>
      <text:p text:style-name="P561"><text:s text:c="4"/>margin-bottom: 24px;</text:p>
      <text:p text:style-name="P562"><text:s text:c="2"/>}</text:p>
      <text:p text:style-name="P563"/>
      <text:p text:style-name="P564"><text:s text:c="2"/>.service-icon svg { width: 26px; height: 26px; fill: var(--g300); }</text:p>
      <text:p text:style-name="P565"/>
      <text:p text:style-name="P566"><text:s text:c="2"/>.service-card h3 {</text:p>
      <text:p text:style-name="P567"><text:s text:c="4"/>font-family: 'Barlow Condensed', sans-serif;</text:p>
      <text:p text:style-name="P568"><text:s text:c="4"/>font-size: 1.25rem;</text:p>
      <text:p text:style-name="P569"><text:s text:c="4"/>font-weight: 700;</text:p>
      <text:p text:style-name="P570"><text:s text:c="4"/>letter-spacing: 2px;</text:p>
      <text:p text:style-name="P571"><text:s text:c="4"/>text-transform: uppercase;</text:p>
      <text:p text:style-name="P572"><text:s text:c="4"/>color: var(--white);</text:p>
      <text:p text:style-name="P573"><text:s text:c="4"/>margin-bottom: 16px;</text:p>
      <text:p text:style-name="P574"><text:s text:c="2"/>}</text:p>
      <text:p text:style-name="P575"/>
      <text:p text:style-name="P576"><text:s text:c="2"/>.service-list {</text:p>
      <text:p text:style-name="P577"><text:s text:c="4"/>list-style: none;</text:p>
      <text:p text:style-name="P578"><text:s text:c="4"/>display: flex;</text:p>
      <text:p text:style-name="P579"><text:s text:c="4"/>flex-direction: column;</text:p>
      <text:p text:style-name="P580"><text:s text:c="4"/>gap: 8px;</text:p>
      <text:p text:style-name="P581"><text:s text:c="2"/>}</text:p>
      <text:p text:style-name="P582"/>
      <text:p text:style-name="P583"><text:s text:c="2"/>.service-list li {</text:p>
      <text:p text:style-name="P584"><text:s text:c="4"/>display: flex;</text:p>
      <text:p text:style-name="P585"><text:s text:c="4"/>align-items: center;</text:p>
      <text:p text:style-name="P586"><text:s text:c="4"/>gap: 10px;</text:p>
      <text:p text:style-name="P587"><text:s text:c="4"/>font-size: 0.88rem;</text:p>
      <text:p text:style-name="P588"><text:s text:c="4"/>color: var(--muted);</text:p>
      <text:p text:style-name="P589"><text:s text:c="2"/>}</text:p>
      <text:p text:style-name="P590"/>
      <text:soft-page-break/>
      <text:p text:style-name="P591"><text:s text:c="2"/>.service-list li::before {</text:p>
      <text:p text:style-name="P592"><text:s text:c="4"/>content: '';</text:p>
      <text:p text:style-name="P593"><text:s text:c="4"/>width: 5px; height: 5px;</text:p>
      <text:p text:style-name="P594"><text:s text:c="4"/>background: var(--g400);</text:p>
      <text:p text:style-name="P595"><text:s text:c="4"/>border-radius: 50%;</text:p>
      <text:p text:style-name="P596"><text:s text:c="4"/>flex-shrink: 0;</text:p>
      <text:p text:style-name="P597"><text:s text:c="2"/>}</text:p>
      <text:p text:style-name="P598"/>
      <text:p text:style-name="P599"><text:s text:c="2"/>/* ===== WHY US ===== */</text:p>
      <text:p text:style-name="P600"><text:s text:c="2"/>.why {</text:p>
      <text:p text:style-name="P601"><text:s text:c="4"/>background: linear-gradient(180deg, var(--g900) 0%, var(--dark) 100%);</text:p>
      <text:p text:style-name="P602"><text:s text:c="4"/>overflow: hidden;</text:p>
      <text:p text:style-name="P603"><text:s text:c="2"/>}</text:p>
      <text:p text:style-name="P604"/>
      <text:p text:style-name="P605"><text:s text:c="2"/>.why-glow {</text:p>
      <text:p text:style-name="P606"><text:s text:c="4"/>position: absolute;</text:p>
      <text:p text:style-name="P607"><text:s text:c="4"/>width: 600px; height: 600px;</text:p>
      <text:p text:style-name="P608"><text:s text:c="4"/>background: radial-gradient(circle, rgba(45,106,63,0.15) 0%, transparent 70%);</text:p>
      <text:p text:style-name="P609"><text:s text:c="4"/>border-radius: 50%;</text:p>
      <text:p text:style-name="P610"><text:s text:c="4"/>top: 50%; left: 50%;</text:p>
      <text:p text:style-name="P611"><text:s text:c="4"/>transform: translate(-50%, -50%);</text:p>
      <text:p text:style-name="P612"><text:s text:c="4"/>pointer-events: none;</text:p>
      <text:p text:style-name="P613"><text:s text:c="2"/>}</text:p>
      <text:p text:style-name="P614"/>
      <text:p text:style-name="P615"><text:s text:c="2"/>.why-grid {</text:p>
      <text:p text:style-name="P616"><text:s text:c="4"/>display: grid;</text:p>
      <text:p text:style-name="P617"><text:s text:c="4"/>grid-template-columns: repeat(auto-fit, minmax(250px, 1fr));</text:p>
      <text:p text:style-name="P618"><text:s text:c="4"/>gap: 24px;</text:p>
      <text:p text:style-name="P619"><text:s text:c="4"/>max-width: 1100px;</text:p>
      <text:p text:style-name="P620"><text:s text:c="4"/>margin: 0 auto;</text:p>
      <text:p text:style-name="P621"><text:s text:c="2"/>}</text:p>
      <text:p text:style-name="P622"/>
      <text:p text:style-name="P623"><text:s text:c="2"/>.why-card {</text:p>
      <text:p text:style-name="P624"><text:s text:c="4"/>background: rgba(13,31,16,0.7);</text:p>
      <text:p text:style-name="P625"><text:s text:c="4"/>border: 1px solid rgba(45,106,63,0.2);</text:p>
      <text:p text:style-name="P626"><text:s text:c="4"/>border-radius: 8px;</text:p>
      <text:p text:style-name="P627"><text:s text:c="4"/>padding: 32px 28px;</text:p>
      <text:p text:style-name="P628"><text:s text:c="4"/>transition: all 0.3s;</text:p>
      <text:p text:style-name="P629"><text:s text:c="2"/>}</text:p>
      <text:p text:style-name="P630"/>
      <text:soft-page-break/>
      <text:p text:style-name="P631"><text:s text:c="2"/>.why-card:hover {</text:p>
      <text:p text:style-name="P632"><text:s text:c="4"/>border-color: rgba(82,179,107,0.4);</text:p>
      <text:p text:style-name="P633"><text:s text:c="4"/>background: rgba(13,31,16,0.95);</text:p>
      <text:p text:style-name="P634"><text:s text:c="4"/>transform: translateY(-4px);</text:p>
      <text:p text:style-name="P635"><text:s text:c="4"/>box-shadow: 0 12px 40px rgba(0,0,0,0.35);</text:p>
      <text:p text:style-name="P636"><text:s text:c="2"/>}</text:p>
      <text:p text:style-name="P637"/>
      <text:p text:style-name="P638"><text:s text:c="2"/>.why-num {</text:p>
      <text:p text:style-name="P639"><text:s text:c="4"/>font-family: 'Bebas Neue', sans-serif;</text:p>
      <text:p text:style-name="P640"><text:s text:c="4"/>font-size: 3rem;</text:p>
      <text:p text:style-name="P641"><text:s text:c="4"/>color: rgba(45,106,63,0.3);</text:p>
      <text:p text:style-name="P642"><text:s text:c="4"/>line-height: 1;</text:p>
      <text:p text:style-name="P643"><text:s text:c="4"/>margin-bottom: 12px;</text:p>
      <text:p text:style-name="P644"><text:s text:c="4"/>letter-spacing: 2px;</text:p>
      <text:p text:style-name="P645"><text:s text:c="2"/>}</text:p>
      <text:p text:style-name="P646"/>
      <text:p text:style-name="P647"><text:s text:c="2"/>.why-card h3 {</text:p>
      <text:p text:style-name="P648"><text:s text:c="4"/>font-family: 'Barlow Condensed', sans-serif;</text:p>
      <text:p text:style-name="P649"><text:s text:c="4"/>font-size: 1.1rem;</text:p>
      <text:p text:style-name="P650"><text:s text:c="4"/>font-weight: 700;</text:p>
      <text:p text:style-name="P651"><text:s text:c="4"/>letter-spacing: 2px;</text:p>
      <text:p text:style-name="P652"><text:s text:c="4"/>text-transform: uppercase;</text:p>
      <text:p text:style-name="P653"><text:s text:c="4"/>color: var(--g200);</text:p>
      <text:p text:style-name="P654"><text:s text:c="4"/>margin-bottom: 10px;</text:p>
      <text:p text:style-name="P655"><text:s text:c="2"/>}</text:p>
      <text:p text:style-name="P656"/>
      <text:p text:style-name="P657"><text:s text:c="2"/>.why-card p {</text:p>
      <text:p text:style-name="P658"><text:s text:c="4"/>font-size: 0.88rem;</text:p>
      <text:p text:style-name="P659"><text:s text:c="4"/>color: var(--muted);</text:p>
      <text:p text:style-name="P660"><text:s text:c="4"/>line-height: 1.7;</text:p>
      <text:p text:style-name="P661"><text:s text:c="2"/>}</text:p>
      <text:p text:style-name="P662"/>
      <text:p text:style-name="P663"><text:s text:c="2"/>/* ===== EVENTS ===== */</text:p>
      <text:p text:style-name="P664"><text:s text:c="2"/>.events { background: var(--dark); }</text:p>
      <text:p text:style-name="P665"/>
      <text:p text:style-name="P666"><text:s text:c="2"/>.events-grid {</text:p>
      <text:p text:style-name="P667"><text:s text:c="4"/>display: grid;</text:p>
      <text:p text:style-name="P668"><text:s text:c="4"/>grid-template-columns: repeat(auto-fit, minmax(220px, 1fr));</text:p>
      <text:p text:style-name="P669"><text:s text:c="4"/>gap: 20px;</text:p>
      <text:p text:style-name="P670"><text:s text:c="4"/>max-width: 1200px;</text:p>
      <text:soft-page-break/>
      <text:p text:style-name="P671"><text:s text:c="4"/>margin: 0 auto;</text:p>
      <text:p text:style-name="P672"><text:s text:c="2"/>}</text:p>
      <text:p text:style-name="P673"/>
      <text:p text:style-name="P674"><text:s text:c="2"/>.event-card {</text:p>
      <text:p text:style-name="P675"><text:s text:c="4"/>background: var(--card);</text:p>
      <text:p text:style-name="P676"><text:s text:c="4"/>border: 1px solid rgba(45,106,63,0.18);</text:p>
      <text:p text:style-name="P677"><text:s text:c="4"/>border-radius: 8px;</text:p>
      <text:p text:style-name="P678"><text:s text:c="4"/>padding: 30px 24px;</text:p>
      <text:p text:style-name="P679"><text:s text:c="4"/>text-align: center;</text:p>
      <text:p text:style-name="P680"><text:s text:c="4"/>transition: all 0.3s;</text:p>
      <text:p text:style-name="P681"><text:s text:c="4"/>position: relative;</text:p>
      <text:p text:style-name="P682"><text:s text:c="4"/>overflow: hidden;</text:p>
      <text:p text:style-name="P683"><text:s text:c="2"/>}</text:p>
      <text:p text:style-name="P684"/>
      <text:p text:style-name="P685"><text:s text:c="2"/>.event-card::before {</text:p>
      <text:p text:style-name="P686"><text:s text:c="4"/>content: '';</text:p>
      <text:p text:style-name="P687"><text:s text:c="4"/>position: absolute;</text:p>
      <text:p text:style-name="P688"><text:s text:c="4"/>top: -100%;</text:p>
      <text:p text:style-name="P689"><text:s text:c="4"/>left: 0; right: 0;</text:p>
      <text:p text:style-name="P690"><text:s text:c="4"/>height: 100%;</text:p>
      <text:p text:style-name="P691"><text:s text:c="4"/>background: linear-gradient(180deg, rgba(45,106,63,0.12) 0%, transparent 100%);</text:p>
      <text:p text:style-name="P692"><text:s text:c="4"/>transition: top 0.35s;</text:p>
      <text:p text:style-name="P693"><text:s text:c="2"/>}</text:p>
      <text:p text:style-name="P694"/>
      <text:p text:style-name="P695"><text:s text:c="2"/>.event-card:hover::before { top: 0; }</text:p>
      <text:p text:style-name="P696"/>
      <text:p text:style-name="P697"><text:s text:c="2"/>.event-card:hover {</text:p>
      <text:p text:style-name="P698"><text:s text:c="4"/>border-color: rgba(45,106,63,0.45);</text:p>
      <text:p text:style-name="P699"><text:s text:c="4"/>transform: translateY(-5px);</text:p>
      <text:p text:style-name="P700"><text:s text:c="2"/>}</text:p>
      <text:p text:style-name="P701"/>
      <text:p text:style-name="P702"><text:s text:c="2"/>.event-icon {</text:p>
      <text:p text:style-name="P703"><text:s text:c="4"/>width: 52px; height: 52px;</text:p>
      <text:p text:style-name="P704"><text:s text:c="4"/>margin: 0 auto 16px;</text:p>
      <text:p text:style-name="P705"><text:s text:c="4"/>background: rgba(45,106,63,0.2);</text:p>
      <text:p text:style-name="P706"><text:s text:c="4"/>border-radius: 50%;</text:p>
      <text:p text:style-name="P707"><text:s text:c="4"/>display: flex;</text:p>
      <text:p text:style-name="P708"><text:s text:c="4"/>align-items: center;</text:p>
      <text:p text:style-name="P709"><text:s text:c="4"/>justify-content: center;</text:p>
      <text:p text:style-name="P710"><text:s text:c="2"/>}</text:p>
      <text:p text:style-name="P711"/>
      <text:p text:style-name="P712"><text:s text:c="2"/>.event-icon svg { width: 22px; height: 22px; fill: var(--g300); }</text:p>
      <text:p text:style-name="P713"/>
      <text:p text:style-name="P714"><text:s text:c="2"/>.event-card h3 {</text:p>
      <text:p text:style-name="P715"><text:s text:c="4"/>font-family: 'Barlow Condensed', sans-serif;</text:p>
      <text:p text:style-name="P716"><text:s text:c="4"/>font-size: 1rem;</text:p>
      <text:p text:style-name="P717"><text:s text:c="4"/>font-weight: 700;</text:p>
      <text:p text:style-name="P718"><text:s text:c="4"/>letter-spacing: 2px;</text:p>
      <text:p text:style-name="P719"><text:s text:c="4"/>text-transform: uppercase;</text:p>
      <text:p text:style-name="P720"><text:s text:c="4"/>color: var(--white);</text:p>
      <text:p text:style-name="P721"><text:s text:c="4"/>margin-bottom: 8px;</text:p>
      <text:p text:style-name="P722"><text:s text:c="2"/>}</text:p>
      <text:p text:style-name="P723"/>
      <text:p text:style-name="P724"><text:s text:c="2"/>.event-card p {</text:p>
      <text:p text:style-name="P725"><text:s text:c="4"/>font-size: 0.82rem;</text:p>
      <text:p text:style-name="P726"><text:s text:c="4"/>color: var(--muted);</text:p>
      <text:p text:style-name="P727"><text:s text:c="4"/>line-height: 1.6;</text:p>
      <text:p text:style-name="P728"><text:s text:c="2"/>}</text:p>
      <text:p text:style-name="P729"/>
      <text:p text:style-name="P730"><text:s text:c="2"/>/* ===== GALLERY ===== */</text:p>
      <text:p text:style-name="P731"><text:s text:c="2"/>.gallery { background: var(--g900); }</text:p>
      <text:p text:style-name="P732"/>
      <text:p text:style-name="P733"><text:s text:c="2"/>.gallery-grid {</text:p>
      <text:p text:style-name="P734"><text:s text:c="4"/>display: grid;</text:p>
      <text:p text:style-name="P735"><text:s text:c="4"/>grid-template-columns: repeat(3, 1fr);</text:p>
      <text:p text:style-name="P736"><text:s text:c="4"/>grid-template-rows: auto;</text:p>
      <text:p text:style-name="P737"><text:s text:c="4"/>gap: 16px;</text:p>
      <text:p text:style-name="P738"><text:s text:c="4"/>max-width: 1100px;</text:p>
      <text:p text:style-name="P739"><text:s text:c="4"/>margin: 0 auto;</text:p>
      <text:p text:style-name="P740"><text:s text:c="2"/>}</text:p>
      <text:p text:style-name="P741"/>
      <text:p text:style-name="P742"><text:s text:c="2"/>.gallery-item {</text:p>
      <text:p text:style-name="P743"><text:s text:c="4"/>border-radius: 6px;</text:p>
      <text:p text:style-name="P744"><text:s text:c="4"/>overflow: hidden;</text:p>
      <text:p text:style-name="P745"><text:s text:c="4"/>position: relative;</text:p>
      <text:p text:style-name="P746"><text:s text:c="4"/>cursor: pointer;</text:p>
      <text:p text:style-name="P747"><text:s text:c="2"/>}</text:p>
      <text:p text:style-name="P748"/>
      <text:p text:style-name="P749"><text:s text:c="2"/>.gallery-item:first-child { grid-column: span 2; }</text:p>
      <text:p text:style-name="P750"><text:s text:c="2"/>.gallery-item:nth-child(4) { grid-column: span 2; }</text:p>
      <text:p text:style-name="P751"/>
      <text:p text:style-name="P752"><text:s text:c="2"/>.gallery-placeholder {</text:p>
      <text:p text:style-name="P753"><text:s text:c="4"/>width: 100%;</text:p>
      <text:p text:style-name="P754"><text:s text:c="4"/>aspect-ratio: 16/9;</text:p>
      <text:p text:style-name="P755"><text:s text:c="4"/>background: var(--card);</text:p>
      <text:p text:style-name="P756"><text:s text:c="4"/>border: 1px dashed rgba(45,106,63,0.35);</text:p>
      <text:p text:style-name="P757"><text:s text:c="4"/>display: flex;</text:p>
      <text:p text:style-name="P758"><text:s text:c="4"/>flex-direction: column;</text:p>
      <text:p text:style-name="P759"><text:s text:c="4"/>align-items: center;</text:p>
      <text:p text:style-name="P760"><text:s text:c="4"/>justify-content: center;</text:p>
      <text:p text:style-name="P761"><text:s text:c="4"/>gap: 12px;</text:p>
      <text:p text:style-name="P762"><text:s text:c="4"/>transition: all 0.3s;</text:p>
      <text:p text:style-name="P763"><text:s text:c="4"/>position: relative;</text:p>
      <text:p text:style-name="P764"><text:s text:c="4"/>overflow: hidden;</text:p>
      <text:p text:style-name="P765"><text:s text:c="2"/>}</text:p>
      <text:p text:style-name="P766"/>
      <text:p text:style-name="P767"><text:s text:c="2"/>.gallery-placeholder::before {</text:p>
      <text:p text:style-name="P768"><text:s text:c="4"/>content: '';</text:p>
      <text:p text:style-name="P769"><text:s text:c="4"/>position: absolute;</text:p>
      <text:p text:style-name="P770"><text:s text:c="4"/>inset: 0;</text:p>
      <text:p text:style-name="P771"><text:s text:c="4"/>background: linear-gradient(135deg, rgba(45,106,63,0.08) 0%, transparent 60%);</text:p>
      <text:p text:style-name="P772"><text:s text:c="2"/>}</text:p>
      <text:p text:style-name="P773"/>
      <text:p text:style-name="P774"><text:s text:c="2"/>.gallery-item:hover .gallery-placeholder {</text:p>
      <text:p text:style-name="P775"><text:s text:c="4"/>border-color: rgba(82,179,107,0.6);</text:p>
      <text:p text:style-name="P776"><text:s text:c="4"/>background: rgba(13,31,16,0.95);</text:p>
      <text:p text:style-name="P777"><text:s text:c="2"/>}</text:p>
      <text:p text:style-name="P778"/>
      <text:p text:style-name="P779"><text:s text:c="2"/>.gallery-placeholder svg { width: 32px; height: 32px; fill: rgba(45,106,63,0.4); }</text:p>
      <text:p text:style-name="P780"/>
      <text:p text:style-name="P781"><text:s text:c="2"/>.gallery-label {</text:p>
      <text:p text:style-name="P782"><text:s text:c="4"/>font-family: 'Barlow Condensed', sans-serif;</text:p>
      <text:p text:style-name="P783"><text:s text:c="4"/>font-size: 0.8rem;</text:p>
      <text:p text:style-name="P784"><text:s text:c="4"/>letter-spacing: 2px;</text:p>
      <text:p text:style-name="P785"><text:s text:c="4"/>text-transform: uppercase;</text:p>
      <text:p text:style-name="P786"><text:s text:c="4"/>color: rgba(45,106,63,0.5);</text:p>
      <text:p text:style-name="P787"><text:s text:c="4"/>font-weight: 600;</text:p>
      <text:p text:style-name="P788"><text:s text:c="2"/>}</text:p>
      <text:p text:style-name="P789"/>
      <text:p text:style-name="P790"><text:s text:c="2"/>/* ===== TESTIMONIALS ===== */</text:p>
      <text:soft-page-break/>
      <text:p text:style-name="P791"><text:s text:c="2"/>.testimonials {</text:p>
      <text:p text:style-name="P792"><text:s text:c="4"/>background: linear-gradient(180deg, var(--g900) 0%, var(--dark) 100%);</text:p>
      <text:p text:style-name="P793"><text:s text:c="2"/>}</text:p>
      <text:p text:style-name="P794"/>
      <text:p text:style-name="P795"><text:s text:c="2"/>.testi-grid {</text:p>
      <text:p text:style-name="P796"><text:s text:c="4"/>display: grid;</text:p>
      <text:p text:style-name="P797"><text:s text:c="4"/>grid-template-columns: repeat(auto-fit, minmax(300px, 1fr));</text:p>
      <text:p text:style-name="P798"><text:s text:c="4"/>gap: 24px;</text:p>
      <text:p text:style-name="P799"><text:s text:c="4"/>max-width: 1100px;</text:p>
      <text:p text:style-name="P800"><text:s text:c="4"/>margin: 0 auto;</text:p>
      <text:p text:style-name="P801"><text:s text:c="2"/>}</text:p>
      <text:p text:style-name="P802"/>
      <text:p text:style-name="P803"><text:s text:c="2"/>.testi-card {</text:p>
      <text:p text:style-name="P804"><text:s text:c="4"/>background: var(--card);</text:p>
      <text:p text:style-name="P805"><text:s text:c="4"/>border: 1px solid rgba(45,106,63,0.18);</text:p>
      <text:p text:style-name="P806"><text:s text:c="4"/>border-radius: 8px;</text:p>
      <text:p text:style-name="P807"><text:s text:c="4"/>padding: 32px 28px;</text:p>
      <text:p text:style-name="P808"><text:s text:c="4"/>position: relative;</text:p>
      <text:p text:style-name="P809"><text:s text:c="4"/>transition: all 0.3s;</text:p>
      <text:p text:style-name="P810"><text:s text:c="2"/>}</text:p>
      <text:p text:style-name="P811"/>
      <text:p text:style-name="P812"><text:s text:c="2"/>.testi-card:hover {</text:p>
      <text:p text:style-name="P813"><text:s text:c="4"/>border-color: rgba(45,106,63,0.4);</text:p>
      <text:p text:style-name="P814"><text:s text:c="4"/>transform: translateY(-4px);</text:p>
      <text:p text:style-name="P815"><text:s text:c="4"/>box-shadow: 0 16px 48px rgba(0,0,0,0.35);</text:p>
      <text:p text:style-name="P816"><text:s text:c="2"/>}</text:p>
      <text:p text:style-name="P817"/>
      <text:p text:style-name="P818"><text:s text:c="2"/>.testi-stars {</text:p>
      <text:p text:style-name="P819"><text:s text:c="4"/>display: flex;</text:p>
      <text:p text:style-name="P820"><text:s text:c="4"/>gap: 4px;</text:p>
      <text:p text:style-name="P821"><text:s text:c="4"/>margin-bottom: 18px;</text:p>
      <text:p text:style-name="P822"><text:s text:c="2"/>}</text:p>
      <text:p text:style-name="P823"/>
      <text:p text:style-name="P824"><text:s text:c="2"/>.star {</text:p>
      <text:p text:style-name="P825"><text:s text:c="4"/>width: 14px; height: 14px;</text:p>
      <text:p text:style-name="P826"><text:s text:c="4"/>background: var(--g400);</text:p>
      <text:p text:style-name="P827"><text:s text:c="4"/>clip-path: polygon(50% 0%, 61% 35%, 98% 35%, 68% 57%, 79% 91%, 50% 70%, 21% 91%, 32% 57%, 2% 35%, 39% 35%);</text:p>
      <text:p text:style-name="P828"><text:s text:c="2"/>}</text:p>
      <text:p text:style-name="P829"/>
      <text:soft-page-break/>
      <text:p text:style-name="P830"><text:s text:c="2"/>.testi-quote {</text:p>
      <text:p text:style-name="P831"><text:s text:c="4"/>font-size: 0.95rem;</text:p>
      <text:p text:style-name="P832"><text:s text:c="4"/>color: var(--offwhite);</text:p>
      <text:p text:style-name="P833"><text:s text:c="4"/>line-height: 1.8;</text:p>
      <text:p text:style-name="P834"><text:s text:c="4"/>font-style: italic;</text:p>
      <text:p text:style-name="P835"><text:s text:c="4"/>margin-bottom: 20px;</text:p>
      <text:p text:style-name="P836"><text:s text:c="2"/>}</text:p>
      <text:p text:style-name="P837"/>
      <text:p text:style-name="P838"><text:s text:c="2"/>.testi-quote::before {</text:p>
      <text:p text:style-name="P839"><text:s text:c="4"/>content: '"';</text:p>
      <text:p text:style-name="P840"><text:s text:c="4"/>font-family: 'Bebas Neue', sans-serif;</text:p>
      <text:p text:style-name="P841"><text:s text:c="4"/>font-size: 3rem;</text:p>
      <text:p text:style-name="P842"><text:s text:c="4"/>color: rgba(45,106,63,0.3);</text:p>
      <text:p text:style-name="P843"><text:s text:c="4"/>line-height: 0.5;</text:p>
      <text:p text:style-name="P844"><text:s text:c="4"/>display: block;</text:p>
      <text:p text:style-name="P845"><text:s text:c="4"/>margin-bottom: 8px;</text:p>
      <text:p text:style-name="P846"><text:s text:c="2"/>}</text:p>
      <text:p text:style-name="P847"/>
      <text:p text:style-name="P848"><text:s text:c="2"/>.testi-author {</text:p>
      <text:p text:style-name="P849"><text:s text:c="4"/>font-family: 'Barlow Condensed', sans-serif;</text:p>
      <text:p text:style-name="P850"><text:s text:c="4"/>font-size: 0.8rem;</text:p>
      <text:p text:style-name="P851"><text:s text:c="4"/>letter-spacing: 2px;</text:p>
      <text:p text:style-name="P852"><text:s text:c="4"/>text-transform: uppercase;</text:p>
      <text:p text:style-name="P853"><text:s text:c="4"/>color: var(--g300);</text:p>
      <text:p text:style-name="P854"><text:s text:c="4"/>font-weight: 600;</text:p>
      <text:p text:style-name="P855"><text:s text:c="2"/>}</text:p>
      <text:p text:style-name="P856"/>
      <text:p text:style-name="P857"><text:s text:c="2"/>/* ===== PACKAGES ===== */</text:p>
      <text:p text:style-name="P858"><text:s text:c="2"/>.packages { background: var(--dark); }</text:p>
      <text:p text:style-name="P859"/>
      <text:p text:style-name="P860"><text:s text:c="2"/>.packages-grid {</text:p>
      <text:p text:style-name="P861"><text:s text:c="4"/>display: grid;</text:p>
      <text:p text:style-name="P862"><text:s text:c="4"/>grid-template-columns: repeat(auto-fit, minmax(300px, 1fr));</text:p>
      <text:p text:style-name="P863"><text:s text:c="4"/>gap: 24px;</text:p>
      <text:p text:style-name="P864"><text:s text:c="4"/>max-width: 1100px;</text:p>
      <text:p text:style-name="P865"><text:s text:c="4"/>margin: 0 auto;</text:p>
      <text:p text:style-name="P866"><text:s text:c="2"/>}</text:p>
      <text:p text:style-name="P867"/>
      <text:p text:style-name="P868"><text:s text:c="2"/>.pkg-card {</text:p>
      <text:p text:style-name="P869"><text:s text:c="4"/>background: var(--card);</text:p>
      <text:soft-page-break/>
      <text:p text:style-name="P870"><text:s text:c="4"/>border: 1px solid rgba(45,106,63,0.2);</text:p>
      <text:p text:style-name="P871"><text:s text:c="4"/>border-radius: 10px;</text:p>
      <text:p text:style-name="P872"><text:s text:c="4"/>padding: 40px 32px;</text:p>
      <text:p text:style-name="P873"><text:s text:c="4"/>position: relative;</text:p>
      <text:p text:style-name="P874"><text:s text:c="4"/>overflow: hidden;</text:p>
      <text:p text:style-name="P875"><text:s text:c="4"/>transition: all 0.35s;</text:p>
      <text:p text:style-name="P876"><text:s text:c="2"/>}</text:p>
      <text:p text:style-name="P877"/>
      <text:p text:style-name="P878"><text:s text:c="2"/>.pkg-card.featured {</text:p>
      <text:p text:style-name="P879"><text:s text:c="4"/>border-color: var(--g400);</text:p>
      <text:p text:style-name="P880"><text:s text:c="4"/>box-shadow: 0 0 0 1px rgba(82,179,107,0.2), 0 20px 60px rgba(45,106,63,0.25);</text:p>
      <text:p text:style-name="P881"><text:s text:c="4"/>transform: scale(1.02);</text:p>
      <text:p text:style-name="P882"><text:s text:c="2"/>}</text:p>
      <text:p text:style-name="P883"/>
      <text:p text:style-name="P884"><text:s text:c="2"/>.pkg-card.featured::before {</text:p>
      <text:p text:style-name="P885"><text:s text:c="4"/>content: 'MOST POPULAR';</text:p>
      <text:p text:style-name="P886"><text:s text:c="4"/>position: absolute;</text:p>
      <text:p text:style-name="P887"><text:s text:c="4"/>top: 0; left: 50%;</text:p>
      <text:p text:style-name="P888"><text:s text:c="4"/>transform: translateX(-50%);</text:p>
      <text:p text:style-name="P889"><text:s text:c="4"/>background: linear-gradient(90deg, var(--g600), var(--g400));</text:p>
      <text:p text:style-name="P890"><text:s text:c="4"/>color: var(--white);</text:p>
      <text:p text:style-name="P891"><text:s text:c="4"/>font-family: 'Barlow Condensed', sans-serif;</text:p>
      <text:p text:style-name="P892"><text:s text:c="4"/>font-size: 0.7rem;</text:p>
      <text:p text:style-name="P893"><text:s text:c="4"/>letter-spacing: 3px;</text:p>
      <text:p text:style-name="P894"><text:s text:c="4"/>font-weight: 700;</text:p>
      <text:p text:style-name="P895"><text:s text:c="4"/>padding: 5px 20px;</text:p>
      <text:p text:style-name="P896"><text:s text:c="4"/>border-radius: 0 0 8px 8px;</text:p>
      <text:p text:style-name="P897"><text:s text:c="2"/>}</text:p>
      <text:p text:style-name="P898"/>
      <text:p text:style-name="P899"><text:s text:c="2"/>.pkg-card:hover:not(.featured) {</text:p>
      <text:p text:style-name="P900"><text:s text:c="4"/>border-color: rgba(45,106,63,0.45);</text:p>
      <text:p text:style-name="P901"><text:s text:c="4"/>transform: translateY(-6px);</text:p>
      <text:p text:style-name="P902"><text:s text:c="4"/>box-shadow: 0 20px 50px rgba(0,0,0,0.4);</text:p>
      <text:p text:style-name="P903"><text:s text:c="2"/>}</text:p>
      <text:p text:style-name="P904"/>
      <text:p text:style-name="P905"><text:s text:c="2"/>.pkg-name {</text:p>
      <text:p text:style-name="P906"><text:s text:c="4"/>font-family: 'Bebas Neue', sans-serif;</text:p>
      <text:p text:style-name="P907"><text:s text:c="4"/>font-size: 1.6rem;</text:p>
      <text:p text:style-name="P908"><text:s text:c="4"/>letter-spacing: 3px;</text:p>
      <text:p text:style-name="P909"><text:s text:c="4"/>color: var(--white);</text:p>
      <text:soft-page-break/>
      <text:p text:style-name="P910"><text:s text:c="4"/>margin-bottom: 6px;</text:p>
      <text:p text:style-name="P911"><text:s text:c="2"/>}</text:p>
      <text:p text:style-name="P912"/>
      <text:p text:style-name="P913"><text:s text:c="2"/>.pkg-tagline {</text:p>
      <text:p text:style-name="P914"><text:s text:c="4"/>font-size: 0.82rem;</text:p>
      <text:p text:style-name="P915"><text:s text:c="4"/>color: var(--muted);</text:p>
      <text:p text:style-name="P916"><text:s text:c="4"/>margin-bottom: 24px;</text:p>
      <text:p text:style-name="P917"><text:s text:c="2"/>}</text:p>
      <text:p text:style-name="P918"/>
      <text:p text:style-name="P919"><text:s text:c="2"/>.pkg-price {</text:p>
      <text:p text:style-name="P920"><text:s text:c="4"/>font-family: 'Bebas Neue', sans-serif;</text:p>
      <text:p text:style-name="P921"><text:s text:c="4"/>font-size: 1.5rem;</text:p>
      <text:p text:style-name="P922"><text:s text:c="4"/>color: var(--g300);</text:p>
      <text:p text:style-name="P923"><text:s text:c="4"/>letter-spacing: 2px;</text:p>
      <text:p text:style-name="P924"><text:s text:c="4"/>margin-bottom: 28px;</text:p>
      <text:p text:style-name="P925"><text:s text:c="4"/>padding-bottom: 24px;</text:p>
      <text:p text:style-name="P926"><text:s text:c="4"/>border-bottom: 1px solid rgba(45,106,63,0.2);</text:p>
      <text:p text:style-name="P927"><text:s text:c="2"/>}</text:p>
      <text:p text:style-name="P928"/>
      <text:p text:style-name="P929"><text:s text:c="2"/>.pkg-features {</text:p>
      <text:p text:style-name="P930"><text:s text:c="4"/>list-style: none;</text:p>
      <text:p text:style-name="P931"><text:s text:c="4"/>display: flex;</text:p>
      <text:p text:style-name="P932"><text:s text:c="4"/>flex-direction: column;</text:p>
      <text:p text:style-name="P933"><text:s text:c="4"/>gap: 12px;</text:p>
      <text:p text:style-name="P934"><text:s text:c="4"/>margin-bottom: 32px;</text:p>
      <text:p text:style-name="P935"><text:s text:c="2"/>}</text:p>
      <text:p text:style-name="P936"/>
      <text:p text:style-name="P937"><text:s text:c="2"/>.pkg-features li {</text:p>
      <text:p text:style-name="P938"><text:s text:c="4"/>display: flex;</text:p>
      <text:p text:style-name="P939"><text:s text:c="4"/>align-items: center;</text:p>
      <text:p text:style-name="P940"><text:s text:c="4"/>gap: 12px;</text:p>
      <text:p text:style-name="P941"><text:s text:c="4"/>font-size: 0.9rem;</text:p>
      <text:p text:style-name="P942"><text:s text:c="4"/>color: var(--offwhite);</text:p>
      <text:p text:style-name="P943"><text:s text:c="2"/>}</text:p>
      <text:p text:style-name="P944"/>
      <text:p text:style-name="P945"><text:s text:c="2"/>.pkg-check {</text:p>
      <text:p text:style-name="P946"><text:s text:c="4"/>width: 20px; height: 20px;</text:p>
      <text:p text:style-name="P947"><text:s text:c="4"/>background: rgba(45,106,63,0.25);</text:p>
      <text:p text:style-name="P948"><text:s text:c="4"/>border: 1px solid var(--g500);</text:p>
      <text:p text:style-name="P949"><text:s text:c="4"/>border-radius: 50%;</text:p>
      <text:soft-page-break/>
      <text:p text:style-name="P950"><text:s text:c="4"/>display: flex;</text:p>
      <text:p text:style-name="P951"><text:s text:c="4"/>align-items: center;</text:p>
      <text:p text:style-name="P952"><text:s text:c="4"/>justify-content: center;</text:p>
      <text:p text:style-name="P953"><text:s text:c="4"/>flex-shrink: 0;</text:p>
      <text:p text:style-name="P954"><text:s text:c="2"/>}</text:p>
      <text:p text:style-name="P955"/>
      <text:p text:style-name="P956"><text:s text:c="2"/>.pkg-check svg { width: 10px; height: 10px; fill: var(--g300); }</text:p>
      <text:p text:style-name="P957"/>
      <text:p text:style-name="P958"><text:s text:c="2"/>/* ===== FAQ ===== */</text:p>
      <text:p text:style-name="P959"><text:s text:c="2"/>.faq { background: var(--g900); }</text:p>
      <text:p text:style-name="P960"/>
      <text:p text:style-name="P961"><text:s text:c="2"/>.faq-inner {</text:p>
      <text:p text:style-name="P962"><text:s text:c="4"/>max-width: 760px;</text:p>
      <text:p text:style-name="P963"><text:s text:c="4"/>margin: 0 auto;</text:p>
      <text:p text:style-name="P964"><text:s text:c="2"/>}</text:p>
      <text:p text:style-name="P965"/>
      <text:p text:style-name="P966"><text:s text:c="2"/>.faq-item {</text:p>
      <text:p text:style-name="P967"><text:s text:c="4"/>border: 1px solid rgba(45,106,63,0.2);</text:p>
      <text:p text:style-name="P968"><text:s text:c="4"/>border-radius: 6px;</text:p>
      <text:p text:style-name="P969"><text:s text:c="4"/>margin-bottom: 12px;</text:p>
      <text:p text:style-name="P970"><text:s text:c="4"/>overflow: hidden;</text:p>
      <text:p text:style-name="P971"><text:s text:c="4"/>background: var(--card);</text:p>
      <text:p text:style-name="P972"><text:s text:c="2"/>}</text:p>
      <text:p text:style-name="P973"/>
      <text:p text:style-name="P974"><text:s text:c="2"/>.faq-question {</text:p>
      <text:p text:style-name="P975"><text:s text:c="4"/>width: 100%;</text:p>
      <text:p text:style-name="P976"><text:s text:c="4"/>background: none;</text:p>
      <text:p text:style-name="P977"><text:s text:c="4"/>border: none;</text:p>
      <text:p text:style-name="P978"><text:s text:c="4"/>padding: 22px 28px;</text:p>
      <text:p text:style-name="P979"><text:s text:c="4"/>display: flex;</text:p>
      <text:p text:style-name="P980"><text:s text:c="4"/>align-items: center;</text:p>
      <text:p text:style-name="P981"><text:s text:c="4"/>justify-content: space-between;</text:p>
      <text:p text:style-name="P982"><text:s text:c="4"/>cursor: pointer;</text:p>
      <text:p text:style-name="P983"><text:s text:c="4"/>text-align: left;</text:p>
      <text:p text:style-name="P984"><text:s text:c="4"/>font-family: 'Barlow Condensed', sans-serif;</text:p>
      <text:p text:style-name="P985"><text:s text:c="4"/>font-size: 1rem;</text:p>
      <text:p text:style-name="P986"><text:s text:c="4"/>font-weight: 600;</text:p>
      <text:p text:style-name="P987"><text:s text:c="4"/>letter-spacing: 1.5px;</text:p>
      <text:p text:style-name="P988"><text:s text:c="4"/>text-transform: uppercase;</text:p>
      <text:p text:style-name="P989"><text:s text:c="4"/>color: var(--white);</text:p>
      <text:soft-page-break/>
      <text:p text:style-name="P990"><text:s text:c="4"/>gap: 16px;</text:p>
      <text:p text:style-name="P991"><text:s text:c="4"/>transition: background 0.2s;</text:p>
      <text:p text:style-name="P992"><text:s text:c="2"/>}</text:p>
      <text:p text:style-name="P993"/>
      <text:p text:style-name="P994"><text:s text:c="2"/>.faq-question:hover { background: rgba(45,106,63,0.1); }</text:p>
      <text:p text:style-name="P995"/>
      <text:p text:style-name="P996"><text:s text:c="2"/>.faq-icon {</text:p>
      <text:p text:style-name="P997"><text:s text:c="4"/>width: 22px; height: 22px;</text:p>
      <text:p text:style-name="P998"><text:s text:c="4"/>background: rgba(45,106,63,0.2);</text:p>
      <text:p text:style-name="P999"><text:s text:c="4"/>border-radius: 50%;</text:p>
      <text:p text:style-name="P1000"><text:s text:c="4"/>display: flex;</text:p>
      <text:p text:style-name="P1001"><text:s text:c="4"/>align-items: center;</text:p>
      <text:p text:style-name="P1002"><text:s text:c="4"/>justify-content: center;</text:p>
      <text:p text:style-name="P1003"><text:s text:c="4"/>flex-shrink: 0;</text:p>
      <text:p text:style-name="P1004"><text:s text:c="4"/>transition: transform 0.3s, background 0.2s;</text:p>
      <text:p text:style-name="P1005"><text:s text:c="2"/>}</text:p>
      <text:p text:style-name="P1006"/>
      <text:p text:style-name="P1007"><text:s text:c="2"/>.faq-icon svg { width: 10px; height: 10px; fill: var(--g300); }</text:p>
      <text:p text:style-name="P1008"/>
      <text:p text:style-name="P1009"><text:s text:c="2"/>.faq-item.open .faq-icon { transform: rotate(180deg); background: rgba(45,106,63,0.35); }</text:p>
      <text:p text:style-name="P1010"/>
      <text:p text:style-name="P1011"><text:s text:c="2"/>.faq-answer {</text:p>
      <text:p text:style-name="P1012"><text:s text:c="4"/>max-height: 0;</text:p>
      <text:p text:style-name="P1013"><text:s text:c="4"/>overflow: hidden;</text:p>
      <text:p text:style-name="P1014"><text:s text:c="4"/>transition: max-height 0.35s cubic-bezier(0.2,0,0,1), padding 0.3s;</text:p>
      <text:p text:style-name="P1015"><text:s text:c="4"/>padding: 0 28px;</text:p>
      <text:p text:style-name="P1016"><text:s text:c="4"/>font-size: 0.92rem;</text:p>
      <text:p text:style-name="P1017"><text:s text:c="4"/>color: var(--muted);</text:p>
      <text:p text:style-name="P1018"><text:s text:c="4"/>line-height: 1.75;</text:p>
      <text:p text:style-name="P1019"><text:s text:c="2"/>}</text:p>
      <text:p text:style-name="P1020"/>
      <text:p text:style-name="P1021"><text:s text:c="2"/>.faq-item.open .faq-answer {</text:p>
      <text:p text:style-name="P1022"><text:s text:c="4"/>max-height: 200px;</text:p>
      <text:p text:style-name="P1023"><text:s text:c="4"/>padding: 0 28px 20px;</text:p>
      <text:p text:style-name="P1024"><text:s text:c="2"/>}</text:p>
      <text:p text:style-name="P1025"/>
      <text:p text:style-name="P1026"><text:s text:c="2"/>/* ===== URGENCY ===== */</text:p>
      <text:p text:style-name="P1027"><text:s text:c="2"/>.urgency {</text:p>
      <text:p text:style-name="P1028"><text:s text:c="4"/>background: linear-gradient(135deg, rgba(15,36,20,0.95), rgba(10,26,14,0.98));</text:p>
      <text:soft-page-break/>
      <text:p text:style-name="P1029"><text:s text:c="4"/>border-top: 1px solid rgba(45,106,63,0.25);</text:p>
      <text:p text:style-name="P1030"><text:s text:c="4"/>border-bottom: 1px solid rgba(45,106,63,0.25);</text:p>
      <text:p text:style-name="P1031"><text:s text:c="4"/>padding: 60px 5%;</text:p>
      <text:p text:style-name="P1032"><text:s text:c="4"/>text-align: center;</text:p>
      <text:p text:style-name="P1033"><text:s text:c="4"/>position: relative;</text:p>
      <text:p text:style-name="P1034"><text:s text:c="4"/>overflow: hidden;</text:p>
      <text:p text:style-name="P1035"><text:s text:c="2"/>}</text:p>
      <text:p text:style-name="P1036"/>
      <text:p text:style-name="P1037"><text:s text:c="2"/>.urgency::before {</text:p>
      <text:p text:style-name="P1038"><text:s text:c="4"/>content: '';</text:p>
      <text:p text:style-name="P1039"><text:s text:c="4"/>position: absolute;</text:p>
      <text:p text:style-name="P1040"><text:s text:c="4"/>inset: 0;</text:p>
      <text:p text:style-name="P1041"><text:s text:c="4"/>background: radial-gradient(ellipse 60% 100% at 50% 50%, rgba(45,106,63,0.12) 0%, transparent 70%);</text:p>
      <text:p text:style-name="P1042"><text:s text:c="4"/>pointer-events: none;</text:p>
      <text:p text:style-name="P1043"><text:s text:c="2"/>}</text:p>
      <text:p text:style-name="P1044"/>
      <text:p text:style-name="P1045"><text:s text:c="2"/>.urgency h2 {</text:p>
      <text:p text:style-name="P1046"><text:s text:c="4"/>font-family: 'Bebas Neue', sans-serif;</text:p>
      <text:p text:style-name="P1047"><text:s text:c="4"/>font-size: clamp(2rem, 5vw, 3.5rem);</text:p>
      <text:p text:style-name="P1048"><text:s text:c="4"/>letter-spacing: 3px;</text:p>
      <text:p text:style-name="P1049"><text:s text:c="4"/>color: var(--white);</text:p>
      <text:p text:style-name="P1050"><text:s text:c="4"/>margin-bottom: 12px;</text:p>
      <text:p text:style-name="P1051"><text:s text:c="2"/>}</text:p>
      <text:p text:style-name="P1052"/>
      <text:p text:style-name="P1053"><text:s text:c="2"/>.urgency h2 span { color: var(--g300); }</text:p>
      <text:p text:style-name="P1054"/>
      <text:p text:style-name="P1055"><text:s text:c="2"/>.urgency p {</text:p>
      <text:p text:style-name="P1056"><text:s text:c="4"/>color: var(--muted);</text:p>
      <text:p text:style-name="P1057"><text:s text:c="4"/>font-size: 1rem;</text:p>
      <text:p text:style-name="P1058"><text:s text:c="4"/>margin-bottom: 28px;</text:p>
      <text:p text:style-name="P1059"><text:s text:c="2"/>}</text:p>
      <text:p text:style-name="P1060"/>
      <text:p text:style-name="P1061"><text:s text:c="2"/>/* ===== CONTACT ===== */</text:p>
      <text:p text:style-name="P1062"><text:s text:c="2"/>.contact { background: var(--dark); }</text:p>
      <text:p text:style-name="P1063"/>
      <text:p text:style-name="P1064"><text:s text:c="2"/>.contact-inner {</text:p>
      <text:p text:style-name="P1065"><text:s text:c="4"/>display: grid;</text:p>
      <text:p text:style-name="P1066"><text:s text:c="4"/>grid-template-columns: 1fr 1.4fr;</text:p>
      <text:p text:style-name="P1067"><text:s text:c="4"/>gap: 60px;</text:p>
      <text:soft-page-break/>
      <text:p text:style-name="P1068"><text:s text:c="4"/>max-width: 1100px;</text:p>
      <text:p text:style-name="P1069"><text:s text:c="4"/>margin: 0 auto;</text:p>
      <text:p text:style-name="P1070"><text:s text:c="4"/>align-items: start;</text:p>
      <text:p text:style-name="P1071"><text:s text:c="2"/>}</text:p>
      <text:p text:style-name="P1072"/>
      <text:p text:style-name="P1073"><text:s text:c="2"/>.contact-info h2 {</text:p>
      <text:p text:style-name="P1074"><text:s text:c="4"/>font-family: 'Bebas Neue', sans-serif;</text:p>
      <text:p text:style-name="P1075"><text:s text:c="4"/>font-size: clamp(2rem, 4vw, 2.8rem);</text:p>
      <text:p text:style-name="P1076"><text:s text:c="4"/>letter-spacing: 2px;</text:p>
      <text:p text:style-name="P1077"><text:s text:c="4"/>color: var(--white);</text:p>
      <text:p text:style-name="P1078"><text:s text:c="4"/>margin-bottom: 16px;</text:p>
      <text:p text:style-name="P1079"><text:s text:c="4"/>line-height: 1.05;</text:p>
      <text:p text:style-name="P1080"><text:s text:c="2"/>}</text:p>
      <text:p text:style-name="P1081"/>
      <text:p text:style-name="P1082"><text:s text:c="2"/>.contact-info h2 span { color: var(--g300); }</text:p>
      <text:p text:style-name="P1083"/>
      <text:p text:style-name="P1084"><text:s text:c="2"/>.contact-info p {</text:p>
      <text:p text:style-name="P1085"><text:s text:c="4"/>color: var(--muted);</text:p>
      <text:p text:style-name="P1086"><text:s text:c="4"/>font-size: 0.92rem;</text:p>
      <text:p text:style-name="P1087"><text:s text:c="4"/>line-height: 1.7;</text:p>
      <text:p text:style-name="P1088"><text:s text:c="4"/>margin-bottom: 32px;</text:p>
      <text:p text:style-name="P1089"><text:s text:c="2"/>}</text:p>
      <text:p text:style-name="P1090"/>
      <text:p text:style-name="P1091"><text:s text:c="2"/>.contact-details {</text:p>
      <text:p text:style-name="P1092"><text:s text:c="4"/>display: flex;</text:p>
      <text:p text:style-name="P1093"><text:s text:c="4"/>flex-direction: column;</text:p>
      <text:p text:style-name="P1094"><text:s text:c="4"/>gap: 18px;</text:p>
      <text:p text:style-name="P1095"><text:s text:c="2"/>}</text:p>
      <text:p text:style-name="P1096"/>
      <text:p text:style-name="P1097"><text:s text:c="2"/>.contact-detail {</text:p>
      <text:p text:style-name="P1098"><text:s text:c="4"/>display: flex;</text:p>
      <text:p text:style-name="P1099"><text:s text:c="4"/>align-items: center;</text:p>
      <text:p text:style-name="P1100"><text:s text:c="4"/>gap: 16px;</text:p>
      <text:p text:style-name="P1101"><text:s text:c="2"/>}</text:p>
      <text:p text:style-name="P1102"/>
      <text:p text:style-name="P1103"><text:s text:c="2"/>.contact-detail-icon {</text:p>
      <text:p text:style-name="P1104"><text:s text:c="4"/>width: 42px; height: 42px;</text:p>
      <text:p text:style-name="P1105"><text:s text:c="4"/>background: rgba(45,106,63,0.2);</text:p>
      <text:p text:style-name="P1106"><text:s text:c="4"/>border: 1px solid rgba(45,106,63,0.35);</text:p>
      <text:p text:style-name="P1107"><text:s text:c="4"/>border-radius: 8px;</text:p>
      <text:soft-page-break/>
      <text:p text:style-name="P1108"><text:s text:c="4"/>display: flex;</text:p>
      <text:p text:style-name="P1109"><text:s text:c="4"/>align-items: center;</text:p>
      <text:p text:style-name="P1110"><text:s text:c="4"/>justify-content: center;</text:p>
      <text:p text:style-name="P1111"><text:s text:c="4"/>flex-shrink: 0;</text:p>
      <text:p text:style-name="P1112"><text:s text:c="2"/>}</text:p>
      <text:p text:style-name="P1113"/>
      <text:p text:style-name="P1114"><text:s text:c="2"/>.contact-detail-icon svg { width: 18px; height: 18px; fill: var(--g300); }</text:p>
      <text:p text:style-name="P1115"/>
      <text:p text:style-name="P1116"><text:s text:c="2"/>.contact-detail-label {</text:p>
      <text:p text:style-name="P1117"><text:s text:c="4"/>font-size: 0.72rem;</text:p>
      <text:p text:style-name="P1118"><text:s text:c="4"/>text-transform: uppercase;</text:p>
      <text:p text:style-name="P1119"><text:s text:c="4"/>letter-spacing: 2px;</text:p>
      <text:p text:style-name="P1120"><text:s text:c="4"/>color: var(--muted);</text:p>
      <text:p text:style-name="P1121"><text:s text:c="4"/>font-weight: 600;</text:p>
      <text:p text:style-name="P1122"><text:s text:c="4"/>display: block;</text:p>
      <text:p text:style-name="P1123"><text:s text:c="4"/>margin-bottom: 2px;</text:p>
      <text:p text:style-name="P1124"><text:s text:c="2"/>}</text:p>
      <text:p text:style-name="P1125"/>
      <text:p text:style-name="P1126"><text:s text:c="2"/>.contact-detail-value {</text:p>
      <text:p text:style-name="P1127"><text:s text:c="4"/>font-size: 0.95rem;</text:p>
      <text:p text:style-name="P1128"><text:s text:c="4"/>color: var(--white);</text:p>
      <text:p text:style-name="P1129"><text:s text:c="4"/>font-weight: 500;</text:p>
      <text:p text:style-name="P1130"><text:s text:c="2"/>}</text:p>
      <text:p text:style-name="P1131"/>
      <text:p text:style-name="P1132"><text:s text:c="2"/>.contact-form {</text:p>
      <text:p text:style-name="P1133"><text:s text:c="4"/>background: var(--card);</text:p>
      <text:p text:style-name="P1134"><text:s text:c="4"/>border: 1px solid rgba(45,106,63,0.2);</text:p>
      <text:p text:style-name="P1135"><text:s text:c="4"/>border-radius: 10px;</text:p>
      <text:p text:style-name="P1136"><text:s text:c="4"/>padding: 40px 36px;</text:p>
      <text:p text:style-name="P1137"><text:s text:c="2"/>}</text:p>
      <text:p text:style-name="P1138"/>
      <text:p text:style-name="P1139"><text:s text:c="2"/>.form-row {</text:p>
      <text:p text:style-name="P1140"><text:s text:c="4"/>display: grid;</text:p>
      <text:p text:style-name="P1141"><text:s text:c="4"/>grid-template-columns: 1fr 1fr;</text:p>
      <text:p text:style-name="P1142"><text:s text:c="4"/>gap: 16px;</text:p>
      <text:p text:style-name="P1143"><text:s text:c="4"/>margin-bottom: 16px;</text:p>
      <text:p text:style-name="P1144"><text:s text:c="2"/>}</text:p>
      <text:p text:style-name="P1145"/>
      <text:p text:style-name="P1146"><text:s text:c="2"/>.form-group { margin-bottom: 16px; }</text:p>
      <text:p text:style-name="P1147"/>
      <text:soft-page-break/>
      <text:p text:style-name="P1148"><text:s text:c="2"/>.form-label {</text:p>
      <text:p text:style-name="P1149"><text:s text:c="4"/>display: block;</text:p>
      <text:p text:style-name="P1150"><text:s text:c="4"/>font-size: 0.75rem;</text:p>
      <text:p text:style-name="P1151"><text:s text:c="4"/>text-transform: uppercase;</text:p>
      <text:p text:style-name="P1152"><text:s text:c="4"/>letter-spacing: 1.5px;</text:p>
      <text:p text:style-name="P1153"><text:s text:c="4"/>color: var(--muted);</text:p>
      <text:p text:style-name="P1154"><text:s text:c="4"/>font-weight: 600;</text:p>
      <text:p text:style-name="P1155"><text:s text:c="4"/>margin-bottom: 8px;</text:p>
      <text:p text:style-name="P1156"><text:s text:c="2"/>}</text:p>
      <text:p text:style-name="P1157"/>
      <text:p text:style-name="P1158"><text:s text:c="2"/>.form-input, .form-select, .form-textarea {</text:p>
      <text:p text:style-name="P1159"><text:s text:c="4"/>width: 100%;</text:p>
      <text:p text:style-name="P1160"><text:s text:c="4"/>background: rgba(6,14,8,0.8);</text:p>
      <text:p text:style-name="P1161"><text:s text:c="4"/>border: 1px solid rgba(45,106,63,0.25);</text:p>
      <text:p text:style-name="P1162"><text:s text:c="4"/>border-radius: 5px;</text:p>
      <text:p text:style-name="P1163"><text:s text:c="4"/>padding: 12px 16px;</text:p>
      <text:p text:style-name="P1164"><text:s text:c="4"/>color: var(--white);</text:p>
      <text:p text:style-name="P1165"><text:s text:c="4"/>font-family: 'DM Sans', sans-serif;</text:p>
      <text:p text:style-name="P1166"><text:s text:c="4"/>font-size: 0.9rem;</text:p>
      <text:p text:style-name="P1167"><text:s text:c="4"/>transition: border-color 0.2s, box-shadow 0.2s;</text:p>
      <text:p text:style-name="P1168"><text:s text:c="4"/>outline: none;</text:p>
      <text:p text:style-name="P1169"><text:s text:c="2"/>}</text:p>
      <text:p text:style-name="P1170"/>
      <text:p text:style-name="P1171"><text:s text:c="2"/>.form-input:focus, .form-select:focus, .form-textarea:focus {</text:p>
      <text:p text:style-name="P1172"><text:s text:c="4"/>border-color: var(--g400);</text:p>
      <text:p text:style-name="P1173"><text:s text:c="4"/>box-shadow: 0 0 0 3px rgba(45,106,63,0.15);</text:p>
      <text:p text:style-name="P1174"><text:s text:c="2"/>}</text:p>
      <text:p text:style-name="P1175"/>
      <text:p text:style-name="P1176"><text:s text:c="2"/>.form-select {</text:p>
      <text:p text:style-name="P1177"><text:s text:c="4"/>-webkit-appearance: none;</text:p>
      <text:p text:style-name="P1178"><text:s text:c="4"/>background-image: url("data:image/svg+xml,%3Csvg xmlns='http://www.w3.org/2000/svg' viewBox='0 0 12 8'%3E%3Cpath fill='%233d8b52' d='M6 8L0 0h12z'/%3E%3C/svg%3E");</text:p>
      <text:p text:style-name="P1179"><text:s text:c="4"/>background-repeat: no-repeat;</text:p>
      <text:p text:style-name="P1180"><text:s text:c="4"/>background-position: right 14px center;</text:p>
      <text:p text:style-name="P1181"><text:s text:c="4"/>background-size: 10px;</text:p>
      <text:p text:style-name="P1182"><text:s text:c="2"/>}</text:p>
      <text:p text:style-name="P1183"/>
      <text:p text:style-name="P1184"><text:s text:c="2"/>.form-textarea { resize: vertical; min-height: 110px; }</text:p>
      <text:p text:style-name="P1185"/>
      <text:soft-page-break/>
      <text:p text:style-name="P1186"><text:s text:c="2"/>.form-select option { background: var(--g800); }</text:p>
      <text:p text:style-name="P1187"/>
      <text:p text:style-name="P1188"><text:s text:c="2"/>.form-submit {</text:p>
      <text:p text:style-name="P1189"><text:s text:c="4"/>width: 100%;</text:p>
      <text:p text:style-name="P1190"><text:s text:c="4"/>background: linear-gradient(135deg, var(--g500), var(--g400));</text:p>
      <text:p text:style-name="P1191"><text:s text:c="4"/>color: var(--white);</text:p>
      <text:p text:style-name="P1192"><text:s text:c="4"/>padding: 15px;</text:p>
      <text:p text:style-name="P1193"><text:s text:c="4"/>border: none;</text:p>
      <text:p text:style-name="P1194"><text:s text:c="4"/>border-radius: 5px;</text:p>
      <text:p text:style-name="P1195"><text:s text:c="4"/>font-family: 'Barlow Condensed', sans-serif;</text:p>
      <text:p text:style-name="P1196"><text:s text:c="4"/>font-size: 1rem;</text:p>
      <text:p text:style-name="P1197"><text:s text:c="4"/>font-weight: 700;</text:p>
      <text:p text:style-name="P1198"><text:s text:c="4"/>letter-spacing: 3px;</text:p>
      <text:p text:style-name="P1199"><text:s text:c="4"/>text-transform: uppercase;</text:p>
      <text:p text:style-name="P1200"><text:s text:c="4"/>cursor: pointer;</text:p>
      <text:p text:style-name="P1201"><text:s text:c="4"/>transition: all 0.25s;</text:p>
      <text:p text:style-name="P1202"><text:s text:c="4"/>box-shadow: 0 4px 20px rgba(45,106,63,0.3);</text:p>
      <text:p text:style-name="P1203"><text:s text:c="2"/>}</text:p>
      <text:p text:style-name="P1204"/>
      <text:p text:style-name="P1205"><text:s text:c="2"/>.form-submit:hover {</text:p>
      <text:p text:style-name="P1206"><text:s text:c="4"/>transform: translateY(-2px);</text:p>
      <text:p text:style-name="P1207"><text:s text:c="4"/>box-shadow: 0 8px 30px rgba(45,106,63,0.5);</text:p>
      <text:p text:style-name="P1208"><text:s text:c="4"/>background: linear-gradient(135deg, var(--g400), var(--g300));</text:p>
      <text:p text:style-name="P1209"><text:s text:c="2"/>}</text:p>
      <text:p text:style-name="P1210"/>
      <text:p text:style-name="P1211"><text:s text:c="2"/>/* ===== FOOTER ===== */</text:p>
      <text:p text:style-name="P1212"><text:s text:c="2"/>footer {</text:p>
      <text:p text:style-name="P1213"><text:s text:c="4"/>background: var(--dark);</text:p>
      <text:p text:style-name="P1214"><text:s text:c="4"/>border-top: 1px solid rgba(45,106,63,0.15);</text:p>
      <text:p text:style-name="P1215"><text:s text:c="4"/>padding: 50px 5% 30px;</text:p>
      <text:p text:style-name="P1216"><text:s text:c="2"/>}</text:p>
      <text:p text:style-name="P1217"/>
      <text:p text:style-name="P1218"><text:s text:c="2"/>.footer-inner {</text:p>
      <text:p text:style-name="P1219"><text:s text:c="4"/>display: grid;</text:p>
      <text:p text:style-name="P1220"><text:s text:c="4"/>grid-template-columns: 1.5fr 1fr 1fr;</text:p>
      <text:p text:style-name="P1221"><text:s text:c="4"/>gap: 40px;</text:p>
      <text:p text:style-name="P1222"><text:s text:c="4"/>max-width: 1100px;</text:p>
      <text:p text:style-name="P1223"><text:s text:c="4"/>margin: 0 auto 40px;</text:p>
      <text:p text:style-name="P1224"><text:s text:c="2"/>}</text:p>
      <text:p text:style-name="P1225"/>
      <text:soft-page-break/>
      <text:p text:style-name="P1226"><text:s text:c="2"/>.footer-brand p {</text:p>
      <text:p text:style-name="P1227"><text:s text:c="4"/>font-size: 0.85rem;</text:p>
      <text:p text:style-name="P1228"><text:s text:c="4"/>color: var(--muted);</text:p>
      <text:p text:style-name="P1229"><text:s text:c="4"/>line-height: 1.7;</text:p>
      <text:p text:style-name="P1230"><text:s text:c="4"/>margin-top: 16px;</text:p>
      <text:p text:style-name="P1231"><text:s text:c="4"/>max-width: 280px;</text:p>
      <text:p text:style-name="P1232"><text:s text:c="2"/>}</text:p>
      <text:p text:style-name="P1233"/>
      <text:p text:style-name="P1234"><text:s text:c="2"/>.footer-col h4 {</text:p>
      <text:p text:style-name="P1235"><text:s text:c="4"/>font-family: 'Barlow Condensed', sans-serif;</text:p>
      <text:p text:style-name="P1236"><text:s text:c="4"/>font-size: 0.8rem;</text:p>
      <text:p text:style-name="P1237"><text:s text:c="4"/>letter-spacing: 3px;</text:p>
      <text:p text:style-name="P1238"><text:s text:c="4"/>text-transform: uppercase;</text:p>
      <text:p text:style-name="P1239"><text:s text:c="4"/>color: var(--g300);</text:p>
      <text:p text:style-name="P1240"><text:s text:c="4"/>font-weight: 700;</text:p>
      <text:p text:style-name="P1241"><text:s text:c="4"/>margin-bottom: 18px;</text:p>
      <text:p text:style-name="P1242"><text:s text:c="2"/>}</text:p>
      <text:p text:style-name="P1243"/>
      <text:p text:style-name="P1244"><text:s text:c="2"/>.footer-col ul { list-style: none; }</text:p>
      <text:p text:style-name="P1245"/>
      <text:p text:style-name="P1246"><text:s text:c="2"/>.footer-col ul li { margin-bottom: 10px; }</text:p>
      <text:p text:style-name="P1247"/>
      <text:p text:style-name="P1248"><text:s text:c="2"/>.footer-col ul li a {</text:p>
      <text:p text:style-name="P1249"><text:s text:c="4"/>text-decoration: none;</text:p>
      <text:p text:style-name="P1250"><text:s text:c="4"/>font-size: 0.85rem;</text:p>
      <text:p text:style-name="P1251"><text:s text:c="4"/>color: var(--muted);</text:p>
      <text:p text:style-name="P1252"><text:s text:c="4"/>transition: color 0.2s;</text:p>
      <text:p text:style-name="P1253"><text:s text:c="2"/>}</text:p>
      <text:p text:style-name="P1254"/>
      <text:p text:style-name="P1255"><text:s text:c="2"/>.footer-col ul li a:hover { color: var(--g200); }</text:p>
      <text:p text:style-name="P1256"/>
      <text:p text:style-name="P1257"><text:s text:c="2"/>.footer-bottom {</text:p>
      <text:p text:style-name="P1258"><text:s text:c="4"/>border-top: 1px solid rgba(45,106,63,0.12);</text:p>
      <text:p text:style-name="P1259"><text:s text:c="4"/>padding-top: 24px;</text:p>
      <text:p text:style-name="P1260"><text:s text:c="4"/>text-align: center;</text:p>
      <text:p text:style-name="P1261"><text:s text:c="4"/>max-width: 1100px;</text:p>
      <text:p text:style-name="P1262"><text:s text:c="4"/>margin: 0 auto;</text:p>
      <text:p text:style-name="P1263"><text:s text:c="2"/>}</text:p>
      <text:p text:style-name="P1264"/>
      <text:p text:style-name="P1265"><text:s text:c="2"/>.footer-bottom p {</text:p>
      <text:soft-page-break/>
      <text:p text:style-name="P1266"><text:s text:c="4"/>font-size: 0.78rem;</text:p>
      <text:p text:style-name="P1267"><text:s text:c="4"/>color: rgba(122,158,130,0.6);</text:p>
      <text:p text:style-name="P1268"><text:s text:c="4"/>letter-spacing: 1px;</text:p>
      <text:p text:style-name="P1269"><text:s text:c="2"/>}</text:p>
      <text:p text:style-name="P1270"/>
      <text:p text:style-name="P1271"><text:s text:c="2"/>.footer-bottom span { color: var(--g400); }</text:p>
      <text:p text:style-name="P1272"/>
      <text:p text:style-name="P1273"><text:s text:c="2"/>/* ===== SCROLLBAR ===== */</text:p>
      <text:p text:style-name="P1274"><text:s text:c="2"/>::-webkit-scrollbar { width: 6px; }</text:p>
      <text:p text:style-name="P1275"><text:s text:c="2"/>::-webkit-scrollbar-track { background: var(--dark); }</text:p>
      <text:p text:style-name="P1276"><text:s text:c="2"/>::-webkit-scrollbar-thumb { background: var(--g600); border-radius: 3px; }</text:p>
      <text:p text:style-name="P1277"><text:s text:c="2"/>::-webkit-scrollbar-thumb:hover { background: var(--g400); }</text:p>
      <text:p text:style-name="P1278"/>
      <text:p text:style-name="P1279"><text:s text:c="2"/>/* ===== MOBILE ===== */</text:p>
      <text:p text:style-name="P1280"><text:s text:c="2"/>@media (max-width: 900px) {</text:p>
      <text:p text:style-name="P1281"><text:s text:c="4"/>.nav-links { display: none; }</text:p>
      <text:p text:style-name="P1282"><text:s text:c="4"/>.about-inner { grid-template-columns: 1fr; gap: 40px; }</text:p>
      <text:p text:style-name="P1283"><text:s text:c="4"/>.gallery-grid { grid-template-columns: 1fr 1fr; }</text:p>
      <text:p text:style-name="P1284"><text:s text:c="4"/>.gallery-item:first-child, .gallery-item:nth-child(4) { grid-column: span 2; }</text:p>
      <text:p text:style-name="P1285"><text:s text:c="4"/>.contact-inner { grid-template-columns: 1fr; gap: 40px; }</text:p>
      <text:p text:style-name="P1286"><text:s text:c="4"/>.footer-inner { grid-template-columns: 1fr 1fr; }</text:p>
      <text:p text:style-name="P1287"><text:s text:c="4"/>.form-row { grid-template-columns: 1fr; }</text:p>
      <text:p text:style-name="P1288"><text:s text:c="4"/>.pkg-card.featured { transform: none; }</text:p>
      <text:p text:style-name="P1289"><text:s text:c="2"/>}</text:p>
      <text:p text:style-name="P1290"/>
      <text:p text:style-name="P1291"><text:s text:c="2"/>@media (max-width: 600px) {</text:p>
      <text:p text:style-name="P1292"><text:s text:c="4"/>.stat-item { border-right: none; border-bottom: 1px solid var(--border); }</text:p>
      <text:p text:style-name="P1293"><text:s text:c="4"/>.stat-item:last-child { border-bottom: none; }</text:p>
      <text:p text:style-name="P1294"><text:s text:c="4"/>.gallery-grid { grid-template-columns: 1fr; }</text:p>
      <text:p text:style-name="P1295"><text:s text:c="4"/>.gallery-item:first-child, .gallery-item:nth-child(4) { grid-column: span 1; }</text:p>
      <text:p text:style-name="P1296"><text:s text:c="4"/>.footer-inner { grid-template-columns: 1fr; }</text:p>
      <text:p text:style-name="P1297"><text:s text:c="2"/>}</text:p>
      <text:p text:style-name="P1298"/>
      <text:p text:style-name="P1299"><text:s text:c="2"/>/* ===== ANIMATED BARS ===== */</text:p>
      <text:p text:style-name="P1300"><text:s text:c="2"/>.eq-bars {</text:p>
      <text:p text:style-name="P1301"><text:s text:c="4"/>display: flex;</text:p>
      <text:p text:style-name="P1302"><text:s text:c="4"/>align-items: flex-end;</text:p>
      <text:p text:style-name="P1303"><text:s text:c="4"/>gap: 3px;</text:p>
      <text:p text:style-name="P1304"><text:s text:c="4"/>height: 40px;</text:p>
      <text:p text:style-name="P1305"><text:s text:c="2"/>}</text:p>
      <text:p text:style-name="P1306"/>
      <text:p text:style-name="P1307"><text:s text:c="2"/>.eq-bar {</text:p>
      <text:p text:style-name="P1308"><text:s text:c="4"/>width: 4px;</text:p>
      <text:p text:style-name="P1309"><text:s text:c="4"/>background: var(--g400);</text:p>
      <text:p text:style-name="P1310"><text:s text:c="4"/>border-radius: 2px;</text:p>
      <text:p text:style-name="P1311"><text:s text:c="4"/>animation: eqAnim 1.2s ease-in-out infinite alternate;</text:p>
      <text:p text:style-name="P1312"><text:s text:c="2"/>}</text:p>
      <text:p text:style-name="P1313"/>
      <text:p text:style-name="P1314"><text:s text:c="2"/>.eq-bar:nth-child(1) { animation-duration: 0.9s; animation-delay: 0s; }</text:p>
      <text:p text:style-name="P1315"><text:s text:c="2"/>.eq-bar:nth-child(2) { animation-duration: 1.1s; animation-delay: 0.1s; }</text:p>
      <text:p text:style-name="P1316"><text:s text:c="2"/>.eq-bar:nth-child(3) { animation-duration: 0.7s; animation-delay: 0.2s; }</text:p>
      <text:p text:style-name="P1317"><text:s text:c="2"/>.eq-bar:nth-child(4) { animation-duration: 1.3s; animation-delay: 0.05s; }</text:p>
      <text:p text:style-name="P1318"><text:s text:c="2"/>.eq-bar:nth-child(5) { animation-duration: 0.8s; animation-delay: 0.15s; }</text:p>
      <text:p text:style-name="P1319"><text:s text:c="2"/>.eq-bar:nth-child(6) { animation-duration: 1.0s; animation-delay: 0.3s; }</text:p>
      <text:p text:style-name="P1320"><text:s text:c="2"/>.eq-bar:nth-child(7) { animation-duration: 1.2s; animation-delay: 0s; }</text:p>
      <text:p text:style-name="P1321"/>
      <text:p text:style-name="P1322"><text:s text:c="2"/>@keyframes eqAnim {</text:p>
      <text:p text:style-name="P1323"><text:s text:c="4"/>from { height: 8px; opacity: 0.4; }</text:p>
      <text:p text:style-name="P1324"><text:s text:c="4"/>to { height: 100%; opacity: 1; }</text:p>
      <text:p text:style-name="P1325"><text:s text:c="2"/>}</text:p>
      <text:p text:style-name="P1326"/>
      <text:p text:style-name="P1327"><text:s text:c="2"/>/* Fade-in on scroll */</text:p>
      <text:p text:style-name="P1328"><text:s text:c="2"/>.reveal {</text:p>
      <text:p text:style-name="P1329"><text:s text:c="4"/>opacity: 0;</text:p>
      <text:p text:style-name="P1330"><text:s text:c="4"/>transform: translateY(30px);</text:p>
      <text:p text:style-name="P1331"><text:s text:c="4"/>transition: opacity 0.7s ease, transform 0.7s ease;</text:p>
      <text:p text:style-name="P1332"><text:s text:c="2"/>}</text:p>
      <text:p text:style-name="P1333"><text:s text:c="2"/>.reveal.visible {</text:p>
      <text:p text:style-name="P1334"><text:s text:c="4"/>opacity: 1;</text:p>
      <text:p text:style-name="P1335"><text:s text:c="4"/>transform: none;</text:p>
      <text:p text:style-name="P1336"><text:s text:c="2"/>}</text:p>
      <text:p text:style-name="P1337">&lt;/style&gt;</text:p>
      <text:p text:style-name="P1338">&lt;/head&gt;</text:p>
      <text:p text:style-name="P1339">&lt;body&gt;</text:p>
      <text:p text:style-name="P1340"/>
      <text:p text:style-name="P1341">&lt;!-- NAV --&gt;</text:p>
      <text:p text:style-name="P1342">&lt;nav&gt;</text:p>
      <text:p text:style-name="P1343"><text:s text:c="2"/>&lt;a href="#" class="nav-logo"&gt;</text:p>
      <text:p text:style-name="P1344"><text:s text:c="4"/>&lt;!-- SVG Logo Recreation --&gt;</text:p>
      <text:p text:style-name="P1345"><text:s text:c="4"/>&lt;div class="logo-svg-wrap"&gt;</text:p>
      <text:soft-page-break/>
      <text:p text:style-name="P1346"><text:s text:c="6"/>&lt;svg viewBox="0 0 80 80" xmlns="http://www.w3.org/2000/svg" width="44" height="44"&gt;</text:p>
      <text:p text:style-name="P1347"><text:s text:c="8"/>&lt;!-- N shape with wave --&gt;</text:p>
      <text:p text:style-name="P1348"><text:s text:c="8"/>&lt;path d="M12 62 L12 20 L38 55 L38 20" stroke="#1a3a20" stroke-width="9" fill="none" stroke-linecap="round"/&gt;</text:p>
      <text:p text:style-name="P1349"><text:s text:c="8"/>&lt;path d="M38 20 L62 55 L62 20" stroke="#1a3a20" stroke-width="9" fill="none" stroke-linecap="round"/&gt;</text:p>
      <text:p text:style-name="P1350"><text:s text:c="8"/>&lt;path d="M8 48 Q20 28 36 42 Q52 58 66 30" stroke="#2d6a3f" stroke-width="5" fill="none" stroke-linecap="round"/&gt;</text:p>
      <text:p text:style-name="P1351"><text:s text:c="8"/>&lt;path d="M8 48 Q20 28 36 42 Q52 58 66 30" stroke="#52b36b" stroke-width="2.5" fill="none" stroke-linecap="round" opacity="0.7"/&gt;</text:p>
      <text:p text:style-name="P1352"><text:s text:c="8"/>&lt;!-- EQ bars --&gt;</text:p>
      <text:p text:style-name="P1353"><text:s text:c="8"/>&lt;rect x="53" y="22" width="4" height="20" rx="2" fill="#2d6a3f"/&gt;</text:p>
      <text:p text:style-name="P1354"><text:s text:c="8"/>&lt;rect x="59" y="18" width="4" height="24" rx="2" fill="#3d8b52"/&gt;</text:p>
      <text:p text:style-name="P1355"><text:s text:c="8"/>&lt;rect x="65" y="14" width="4" height="28" rx="2" fill="#52b36b"/&gt;</text:p>
      <text:p text:style-name="P1356"><text:s text:c="8"/>&lt;rect x="71" y="20" width="4" height="22" rx="2" fill="#3d8b52"/&gt;</text:p>
      <text:p text:style-name="P1357"><text:s text:c="6"/>&lt;/svg&gt;</text:p>
      <text:p text:style-name="P1358"><text:s text:c="4"/>&lt;/div&gt;</text:p>
      <text:p text:style-name="P1359"><text:s text:c="4"/>&lt;div class="nav-brand"&gt;</text:p>
      <text:p text:style-name="P1360"><text:s text:c="6"/>&lt;span class="nav-brand-name"&gt;N-AUDIO&lt;/span&gt;</text:p>
      <text:p text:style-name="P1361"><text:s text:c="6"/>&lt;span class="nav-brand-sub"&gt;Lights &amp;amp; Sound&lt;/span&gt;</text:p>
      <text:p text:style-name="P1362"><text:s text:c="4"/>&lt;/div&gt;</text:p>
      <text:p text:style-name="P1363"><text:s text:c="2"/>&lt;/a&gt;</text:p>
      <text:p text:style-name="P1364"><text:s text:c="2"/>&lt;ul class="nav-links"&gt;</text:p>
      <text:p text:style-name="P1365"><text:s text:c="4"/>&lt;li&gt;&lt;a href="#services"&gt;Services&lt;/a&gt;&lt;/li&gt;</text:p>
      <text:p text:style-name="P1366"><text:s text:c="4"/>&lt;li&gt;&lt;a href="#why"&gt;Why Us&lt;/a&gt;&lt;/li&gt;</text:p>
      <text:p text:style-name="P1367"><text:s text:c="4"/>&lt;li&gt;&lt;a href="#gallery"&gt;Gallery&lt;/a&gt;&lt;/li&gt;</text:p>
      <text:p text:style-name="P1368"><text:s text:c="4"/>&lt;li&gt;&lt;a href="#packages"&gt;Packages&lt;/a&gt;&lt;/li&gt;</text:p>
      <text:p text:style-name="P1369"><text:s text:c="4"/>&lt;li&gt;&lt;a href="#contact" class="nav-cta"&gt;Book Now&lt;/a&gt;&lt;/li&gt;</text:p>
      <text:p text:style-name="P1370"><text:s text:c="2"/>&lt;/ul&gt;</text:p>
      <text:p text:style-name="P1371">&lt;/nav&gt;</text:p>
      <text:p text:style-name="P1372"/>
      <text:p text:style-name="P1373">&lt;!-- HERO --&gt;</text:p>
      <text:p text:style-name="P1374">&lt;section class="hero"&gt;</text:p>
      <text:p text:style-name="P1375"><text:s text:c="2"/>&lt;div class="hero-bg"&gt;&lt;/div&gt;</text:p>
      <text:p text:style-name="P1376"><text:s text:c="2"/>&lt;div class="hero-grid"&gt;&lt;/div&gt;</text:p>
      <text:p text:style-name="P1377"><text:s text:c="2"/>&lt;svg class="waveform-hero" viewBox="0 0 1440 180" xmlns="http://www.w3.org/2000/svg" preserveAspectRatio="none"&gt;</text:p>
      <text:p text:style-name="P1378"><text:s text:c="4"/>&lt;path d="M0,90 Q60,20 120,90 Q180,160 240,90 Q300,20 360,90 Q420,160 480,90 Q540,20 600,90 Q660,160 720,90 Q780,20 840,90 Q900,160 960,90 Q1020,20 1080,90<text:s/><text:soft-page-break/>Q1140,160 1200,90 Q1260,20 1320,90 Q1380,160 1440,90 L1440,180 L0,180Z" fill="url(#waveGrad)"/&gt;</text:p>
      <text:p text:style-name="P1379"><text:s text:c="4"/>&lt;defs&gt;</text:p>
      <text:p text:style-name="P1380"><text:s text:c="6"/>&lt;linearGradient id="waveGrad" x1="0" y1="0" x2="0" y2="1"&gt;</text:p>
      <text:p text:style-name="P1381"><text:s text:c="8"/>&lt;stop offset="0%" stop-color="#2d6a3f"/&gt;</text:p>
      <text:p text:style-name="P1382"><text:s text:c="8"/>&lt;stop offset="100%" stop-color="transparent"/&gt;</text:p>
      <text:p text:style-name="P1383"><text:s text:c="6"/>&lt;/linearGradient&gt;</text:p>
      <text:p text:style-name="P1384"><text:s text:c="4"/>&lt;/defs&gt;</text:p>
      <text:p text:style-name="P1385"><text:s text:c="2"/>&lt;/svg&gt;</text:p>
      <text:p text:style-name="P1386"/>
      <text:p text:style-name="P1387"><text:s text:c="2"/>&lt;div class="hero-content"&gt;</text:p>
      <text:p text:style-name="P1388"><text:s text:c="4"/>&lt;div class="hero-badge"&gt;</text:p>
      <text:p text:style-name="P1389"><text:s text:c="6"/>&lt;div class="hero-badge-dot"&gt;&lt;/div&gt;</text:p>
      <text:p text:style-name="P1390"><text:s text:c="6"/>Coron, Palawan's Premier Event Production</text:p>
      <text:p text:style-name="P1391"><text:s text:c="4"/>&lt;/div&gt;</text:p>
      <text:p text:style-name="P1392"><text:s text:c="4"/>&lt;h1&gt;Professional&lt;br&gt;&lt;span&gt;Lights, Sound&lt;/span&gt;&lt;br&gt;&amp;amp; Production&lt;/h1&gt;</text:p>
      <text:p text:style-name="P1393"><text:s text:c="4"/>&lt;p class="hero-subtitle"&gt;Making Every Event Extraordinary&lt;/p&gt;</text:p>
      <text:p text:style-name="P1394"><text:s text:c="4"/>&lt;p class="hero-desc"&gt;Crystal-clear audio, stunning lighting, and reliable event production for weddings, corporate events, fiestas, and private celebrations.&lt;/p&gt;</text:p>
      <text:p text:style-name="P1395"><text:s text:c="4"/>&lt;div class="hero-checks"&gt;</text:p>
      <text:p text:style-name="P1396"><text:s text:c="6"/>&lt;div class="hero-check"&gt;</text:p>
      <text:p text:style-name="P1397"><text:s text:c="8"/>&lt;div class="hero-check-icon"&gt;</text:p>
      <text:p text:style-name="P1398"><text:s text:c="10"/>&lt;svg viewBox="0 0 12 12" fill="none" xmlns="http://www.w3.org/2000/svg"&gt;&lt;path d="M2 6l3 3 5-5" stroke="#f0f7f1" stroke-width="2" stroke-linecap="round" stroke-linejoin="round"/&gt;&lt;/svg&gt;</text:p>
      <text:p text:style-name="P1399"><text:s text:c="8"/>&lt;/div&gt;</text:p>
      <text:p text:style-name="P1400"><text:s text:c="8"/>Professional Equipment</text:p>
      <text:p text:style-name="P1401"><text:s text:c="6"/>&lt;/div&gt;</text:p>
      <text:p text:style-name="P1402"><text:s text:c="6"/>&lt;div class="hero-check"&gt;</text:p>
      <text:p text:style-name="P1403"><text:s text:c="8"/>&lt;div class="hero-check-icon"&gt;</text:p>
      <text:p text:style-name="P1404"><text:s text:c="10"/>&lt;svg viewBox="0 0 12 12" fill="none" xmlns="http://www.w3.org/2000/svg"&gt;&lt;path d="M2 6l3 3 5-5" stroke="#f0f7f1" stroke-width="2" stroke-linecap="round" stroke-linejoin="round"/&gt;&lt;/svg&gt;</text:p>
      <text:p text:style-name="P1405"><text:s text:c="8"/>&lt;/div&gt;</text:p>
      <text:p text:style-name="P1406"><text:s text:c="8"/>Experienced Team</text:p>
      <text:p text:style-name="P1407"><text:s text:c="6"/>&lt;/div&gt;</text:p>
      <text:p text:style-name="P1408"><text:s text:c="6"/>&lt;div class="hero-check"&gt;</text:p>
      <text:p text:style-name="P1409"><text:s text:c="8"/>&lt;div class="hero-check-icon"&gt;</text:p>
      <text:soft-page-break/>
      <text:p text:style-name="P1410"><text:s text:c="10"/>&lt;svg viewBox="0 0 12 12" fill="none" xmlns="http://www.w3.org/2000/svg"&gt;&lt;path d="M2 6l3 3 5-5" stroke="#f0f7f1" stroke-width="2" stroke-linecap="round" stroke-linejoin="round"/&gt;&lt;/svg&gt;</text:p>
      <text:p text:style-name="P1411"><text:s text:c="8"/>&lt;/div&gt;</text:p>
      <text:p text:style-name="P1412"><text:s text:c="8"/>On-Time Setup</text:p>
      <text:p text:style-name="P1413"><text:s text:c="6"/>&lt;/div&gt;</text:p>
      <text:p text:style-name="P1414"><text:s text:c="6"/>&lt;div class="hero-check"&gt;</text:p>
      <text:p text:style-name="P1415"><text:s text:c="8"/>&lt;div class="hero-check-icon"&gt;</text:p>
      <text:p text:style-name="P1416"><text:s text:c="10"/>&lt;svg viewBox="0 0 12 12" fill="none" xmlns="http://www.w3.org/2000/svg"&gt;&lt;path d="M2 6l3 3 5-5" stroke="#f0f7f1" stroke-width="2" stroke-linecap="round" stroke-linejoin="round"/&gt;&lt;/svg&gt;</text:p>
      <text:p text:style-name="P1417"><text:s text:c="8"/>&lt;/div&gt;</text:p>
      <text:p text:style-name="P1418"><text:s text:c="8"/>Affordable Packages</text:p>
      <text:p text:style-name="P1419"><text:s text:c="6"/>&lt;/div&gt;</text:p>
      <text:p text:style-name="P1420"><text:s text:c="4"/>&lt;/div&gt;</text:p>
      <text:p text:style-name="P1421"><text:s text:c="4"/>&lt;div class="hero-btns"&gt;</text:p>
      <text:p text:style-name="P1422"><text:s text:c="6"/>&lt;a href="#contact" class="btn-primary"&gt;Get a Free Quote&lt;/a&gt;</text:p>
      <text:p text:style-name="P1423"><text:s text:c="6"/>&lt;a href="#packages" class="btn-outline"&gt;View Packages&lt;/a&gt;</text:p>
      <text:p text:style-name="P1424"><text:s text:c="4"/>&lt;/div&gt;</text:p>
      <text:p text:style-name="P1425"><text:s text:c="2"/>&lt;/div&gt;</text:p>
      <text:p text:style-name="P1426">&lt;/section&gt;</text:p>
      <text:p text:style-name="P1427"/>
      <text:p text:style-name="P1428">&lt;!-- STATS BAR --&gt;</text:p>
      <text:p text:style-name="P1429">&lt;div class="stats-bar"&gt;</text:p>
      <text:p text:style-name="P1430"><text:s text:c="2"/>&lt;div class="stat-item"&gt;</text:p>
      <text:p text:style-name="P1431"><text:s text:c="4"/>&lt;span class="stat-num"&gt;200+&lt;/span&gt;</text:p>
      <text:p text:style-name="P1432"><text:s text:c="4"/>&lt;div class="stat-label"&gt;Events Served&lt;/div&gt;</text:p>
      <text:p text:style-name="P1433"><text:s text:c="2"/>&lt;/div&gt;</text:p>
      <text:p text:style-name="P1434"><text:s text:c="2"/>&lt;div class="stat-item"&gt;</text:p>
      <text:p text:style-name="P1435"><text:s text:c="4"/>&lt;span class="stat-num"&gt;5+&lt;/span&gt;</text:p>
      <text:p text:style-name="P1436"><text:s text:c="4"/>&lt;div class="stat-label"&gt;Years Experience&lt;/div&gt;</text:p>
      <text:p text:style-name="P1437"><text:s text:c="2"/>&lt;/div&gt;</text:p>
      <text:p text:style-name="P1438"><text:s text:c="2"/>&lt;div class="stat-item"&gt;</text:p>
      <text:p text:style-name="P1439"><text:s text:c="4"/>&lt;span class="stat-num"&gt;3&lt;/span&gt;</text:p>
      <text:p text:style-name="P1440"><text:s text:c="4"/>&lt;div class="stat-label"&gt;Core Services&lt;/div&gt;</text:p>
      <text:p text:style-name="P1441"><text:s text:c="2"/>&lt;/div&gt;</text:p>
      <text:p text:style-name="P1442"><text:s text:c="2"/>&lt;div class="stat-item"&gt;</text:p>
      <text:p text:style-name="P1443"><text:s text:c="4"/>&lt;span class="stat-num"&gt;100%&lt;/span&gt;</text:p>
      <text:p text:style-name="P1444"><text:s text:c="4"/>&lt;div class="stat-label"&gt;Client Satisfaction&lt;/div&gt;</text:p>
      <text:p text:style-name="P1445"><text:s text:c="2"/>&lt;/div&gt;</text:p>
      <text:soft-page-break/>
      <text:p text:style-name="P1446">&lt;/div&gt;</text:p>
      <text:p text:style-name="P1447"/>
      <text:p text:style-name="P1448">&lt;!-- ABOUT --&gt;</text:p>
      <text:p text:style-name="P1449">&lt;section class="about section-pad" id="about"&gt;</text:p>
      <text:p text:style-name="P1450"><text:s text:c="2"/>&lt;div class="about-inner"&gt;</text:p>
      <text:p text:style-name="P1451"><text:s text:c="4"/>&lt;div class="about-text reveal"&gt;</text:p>
      <text:p text:style-name="P1452"><text:s text:c="6"/>&lt;h2&gt;Your Event Deserves&lt;br&gt;&lt;em&gt;Professional Production&lt;/em&gt;&lt;/h2&gt;</text:p>
      <text:p text:style-name="P1453"><text:s text:c="6"/>&lt;p&gt;Poor sound can ruin a great event. At N Audio Lights &amp;amp; Sound, we provide complete event solutions so you can focus on your guests while we handle the technical side.&lt;/p&gt;</text:p>
      <text:p text:style-name="P1454"><text:s text:c="6"/>&lt;p&gt;Based in Coron, Palawan, we bring professional-grade audio, lighting, and visual production to every event — from intimate celebrations to large-scale festivals.&lt;/p&gt;</text:p>
      <text:p text:style-name="P1455"><text:s text:c="6"/>&lt;a href="#contact" class="btn-primary"&gt;Start Planning Your Event&lt;/a&gt;</text:p>
      <text:p text:style-name="P1456"><text:s text:c="4"/>&lt;/div&gt;</text:p>
      <text:p text:style-name="P1457"><text:s text:c="4"/>&lt;div class="about-visual reveal"&gt;</text:p>
      <text:p text:style-name="P1458"><text:s text:c="6"/>&lt;div class="about-card"&gt;</text:p>
      <text:p text:style-name="P1459"><text:s text:c="8"/>&lt;div class="about-card-title"&gt;What We Deliver&lt;/div&gt;</text:p>
      <text:p text:style-name="P1460"><text:s text:c="8"/>&lt;div class="about-feat"&gt;</text:p>
      <text:p text:style-name="P1461"><text:s text:c="10"/>&lt;div class="about-feat-icon"&gt;</text:p>
      <text:p text:style-name="P1462"><text:s text:c="12"/>&lt;svg viewBox="0 0 24 24" xmlns="http://www.w3.org/2000/svg"&gt;&lt;path d="M12 1a3 3 0 0 0-3 3v8a3 3 0 0 0 6 0V4a3 3 0 0 0-3-3zm-1 3a1 1 0 0 1 2 0v8a1 1 0 0 1-2 0V4zm8 7v1a7 7 0 0 1-14 0v-1H3v1a9 9 0 0 0 8 8.94V23h2v-2.06A9 9 0 0 0 21 12v-1h-2z"/&gt;&lt;/svg&gt;</text:p>
      <text:p text:style-name="P1463"><text:s text:c="10"/>&lt;/div&gt;</text:p>
      <text:p text:style-name="P1464"><text:s text:c="10"/>&lt;div class="about-feat-text"&gt;</text:p>
      <text:p text:style-name="P1465"><text:s text:c="12"/>&lt;h4&gt;Crystal-Clear Audio&lt;/h4&gt;</text:p>
      <text:p text:style-name="P1466"><text:s text:c="12"/>&lt;p&gt;Professional PA systems tuned for every venue size.&lt;/p&gt;</text:p>
      <text:p text:style-name="P1467"><text:s text:c="10"/>&lt;/div&gt;</text:p>
      <text:p text:style-name="P1468"><text:s text:c="8"/>&lt;/div&gt;</text:p>
      <text:p text:style-name="P1469"><text:s text:c="8"/>&lt;div class="about-feat"&gt;</text:p>
      <text:p text:style-name="P1470"><text:s text:c="10"/>&lt;div class="about-feat-icon"&gt;</text:p>
      <text:p text:style-name="P1471"><text:s text:c="12"/>&lt;svg viewBox="0 0 24 24" xmlns="http://www.w3.org/2000/svg"&gt;&lt;circle cx="12" cy="12" r="5"/&gt;&lt;path d="M12 1v2M12 21v2M4.22 4.22l1.42 1.42M18.36 18.36l1.42 1.42M1 12h2M21 12h2M4.22 19.78l1.42-1.42M18.36 5.64l1.42-1.42"/&gt;&lt;/svg&gt;</text:p>
      <text:p text:style-name="P1472"><text:s text:c="10"/>&lt;/div&gt;</text:p>
      <text:p text:style-name="P1473"><text:s text:c="10"/>&lt;div class="about-feat-text"&gt;</text:p>
      <text:p text:style-name="P1474"><text:s text:c="12"/>&lt;h4&gt;Stunning Lighting Design&lt;/h4&gt;</text:p>
      <text:p text:style-name="P1475"><text:s text:c="12"/>&lt;p&gt;Stage, ambient, and dance floor lighting for any atmosphere.&lt;/p&gt;</text:p>
      <text:p text:style-name="P1476"><text:s text:c="10"/>&lt;/div&gt;</text:p>
      <text:p text:style-name="P1477"><text:s text:c="8"/>&lt;/div&gt;</text:p>
      <text:soft-page-break/>
      <text:p text:style-name="P1478"><text:s text:c="8"/>&lt;div class="about-feat"&gt;</text:p>
      <text:p text:style-name="P1479"><text:s text:c="10"/>&lt;div class="about-feat-icon"&gt;</text:p>
      <text:p text:style-name="P1480"><text:s text:c="12"/>&lt;svg viewBox="0 0 24 24" xmlns="http://www.w3.org/2000/svg"&gt;&lt;rect x="2" y="3" width="20" height="14" rx="2"/&gt;&lt;path d="M8 21h8M12 17v4"/&gt;&lt;/svg&gt;</text:p>
      <text:p text:style-name="P1481"><text:s text:c="10"/>&lt;/div&gt;</text:p>
      <text:p text:style-name="P1482"><text:s text:c="10"/>&lt;div class="about-feat-text"&gt;</text:p>
      <text:p text:style-name="P1483"><text:s text:c="12"/>&lt;h4&gt;LED Wall Displays&lt;/h4&gt;</text:p>
      <text:p text:style-name="P1484"><text:s text:c="12"/>&lt;p&gt;High-impact visual displays for presentations and entertainment.&lt;/p&gt;</text:p>
      <text:p text:style-name="P1485"><text:s text:c="10"/>&lt;/div&gt;</text:p>
      <text:p text:style-name="P1486"><text:s text:c="8"/>&lt;/div&gt;</text:p>
      <text:p text:style-name="P1487"><text:s text:c="8"/>&lt;div class="about-feat" style="margin-bottom:0"&gt;</text:p>
      <text:p text:style-name="P1488"><text:s text:c="10"/>&lt;div class="about-feat-icon"&gt;</text:p>
      <text:p text:style-name="P1489"><text:s text:c="12"/>&lt;svg viewBox="0 0 24 24" xmlns="http://www.w3.org/2000/svg"&gt;&lt;path d="M17 21v-2a4 4 0 0 0-4-4H5a4 4 0 0 0-4 4v2"/&gt;&lt;circle cx="9" cy="7" r="4"/&gt;&lt;path d="M23 21v-2a4 4 0 0 0-3-3.87M16 3.13a4 4 0 0 1 0 7.75"/&gt;&lt;/svg&gt;</text:p>
      <text:p text:style-name="P1490"><text:s text:c="10"/>&lt;/div&gt;</text:p>
      <text:p text:style-name="P1491"><text:s text:c="10"/>&lt;div class="about-feat-text"&gt;</text:p>
      <text:p text:style-name="P1492"><text:s text:c="12"/>&lt;h4&gt;Full Technical Crew&lt;/h4&gt;</text:p>
      <text:p text:style-name="P1493"><text:s text:c="12"/>&lt;p&gt;Setup, operation, and teardown handled by our professionals.&lt;/p&gt;</text:p>
      <text:p text:style-name="P1494"><text:s text:c="10"/>&lt;/div&gt;</text:p>
      <text:p text:style-name="P1495"><text:s text:c="8"/>&lt;/div&gt;</text:p>
      <text:p text:style-name="P1496"><text:s text:c="6"/>&lt;/div&gt;</text:p>
      <text:p text:style-name="P1497"><text:s text:c="4"/>&lt;/div&gt;</text:p>
      <text:p text:style-name="P1498"><text:s text:c="2"/>&lt;/div&gt;</text:p>
      <text:p text:style-name="P1499">&lt;/section&gt;</text:p>
      <text:p text:style-name="P1500"/>
      <text:p text:style-name="P1501">&lt;!-- SERVICES --&gt;</text:p>
      <text:p text:style-name="P1502">&lt;section class="services section-pad" id="services"&gt;</text:p>
      <text:p text:style-name="P1503"><text:s text:c="2"/>&lt;div class="section-header reveal"&gt;</text:p>
      <text:p text:style-name="P1504"><text:s text:c="4"/>&lt;span class="section-tag"&gt;What We Offer&lt;/span&gt;</text:p>
      <text:p text:style-name="P1505"><text:s text:c="4"/>&lt;h2 class="section-title"&gt;Our &lt;span&gt;Services&lt;/span&gt;&lt;/h2&gt;</text:p>
      <text:p text:style-name="P1506"><text:s text:c="4"/>&lt;div class="section-line"&gt;&lt;/div&gt;</text:p>
      <text:p text:style-name="P1507"><text:s text:c="4"/>&lt;p class="section-desc"&gt;Complete event production solutions tailored to every type of occasion.&lt;/p&gt;</text:p>
      <text:p text:style-name="P1508"><text:s text:c="2"/>&lt;/div&gt;</text:p>
      <text:p text:style-name="P1509"><text:s text:c="2"/>&lt;div class="services-grid"&gt;</text:p>
      <text:p text:style-name="P1510"><text:s text:c="4"/>&lt;div class="service-card reveal"&gt;</text:p>
      <text:p text:style-name="P1511"><text:s text:c="6"/>&lt;div class="service-icon"&gt;</text:p>
      <text:p text:style-name="P1512"><text:s text:c="8"/>&lt;svg viewBox="0 0 24 24" xmlns="http://www.w3.org/2000/svg"&gt;&lt;path d="M12 1a3 3 0 0 0-3 3v8a3 3 0 0 0 6 0V4a3 3 0 0 0-3-3zm-1 3a1 1 0 0 1 2 0v8a1 1 0 0 1-2<text:s/><text:soft-page-break/>0V4zm8 7v1a7 7 0 0 1-14 0v-1H3v1a9 9 0 0 0 8 8.94V23h2v-2.06A9 9 0 0 0 21 12v-1h-2z"/&gt;&lt;/svg&gt;</text:p>
      <text:p text:style-name="P1513"><text:s text:c="6"/>&lt;/div&gt;</text:p>
      <text:p text:style-name="P1514"><text:s text:c="6"/>&lt;h3&gt;Professional Sound System&lt;/h3&gt;</text:p>
      <text:p text:style-name="P1515"><text:s text:c="6"/>&lt;ul class="service-list"&gt;</text:p>
      <text:p text:style-name="P1516"><text:s text:c="8"/>&lt;li&gt;Weddings&lt;/li&gt;</text:p>
      <text:p text:style-name="P1517"><text:s text:c="8"/>&lt;li&gt;Birthdays &amp;amp; Celebrations&lt;/li&gt;</text:p>
      <text:p text:style-name="P1518"><text:s text:c="8"/>&lt;li&gt;Corporate Events&lt;/li&gt;</text:p>
      <text:p text:style-name="P1519"><text:s text:c="8"/>&lt;li&gt;School Programs&lt;/li&gt;</text:p>
      <text:p text:style-name="P1520"><text:s text:c="8"/>&lt;li&gt;Live Bands&lt;/li&gt;</text:p>
      <text:p text:style-name="P1521"><text:s text:c="8"/>&lt;li&gt;Festivals &amp;amp; Conferences&lt;/li&gt;</text:p>
      <text:p text:style-name="P1522"><text:s text:c="6"/>&lt;/ul&gt;</text:p>
      <text:p text:style-name="P1523"><text:s text:c="4"/>&lt;/div&gt;</text:p>
      <text:p text:style-name="P1524"><text:s text:c="4"/>&lt;div class="service-card reveal"&gt;</text:p>
      <text:p text:style-name="P1525"><text:s text:c="6"/>&lt;div class="service-icon"&gt;</text:p>
      <text:p text:style-name="P1526"><text:s text:c="8"/>&lt;svg viewBox="0 0 24 24" xmlns="http://www.w3.org/2000/svg"&gt;&lt;circle cx="12" cy="12" r="5"/&gt;&lt;path d="M12 1v2M12 21v2M4.22 4.22l1.42 1.42M18.36 18.36l1.42 1.42M1 12h2M21 12h2M4.22 19.78l1.42-1.42M18.36 5.64l1.42-1.42"/&gt;&lt;/svg&gt;</text:p>
      <text:p text:style-name="P1527"><text:s text:c="6"/>&lt;/div&gt;</text:p>
      <text:p text:style-name="P1528"><text:s text:c="6"/>&lt;h3&gt;Professional Lighting&lt;/h3&gt;</text:p>
      <text:p text:style-name="P1529"><text:s text:c="6"/>&lt;ul class="service-list"&gt;</text:p>
      <text:p text:style-name="P1530"><text:s text:c="8"/>&lt;li&gt;Stage Lighting&lt;/li&gt;</text:p>
      <text:p text:style-name="P1531"><text:s text:c="8"/>&lt;li&gt;Ambient Lighting&lt;/li&gt;</text:p>
      <text:p text:style-name="P1532"><text:s text:c="8"/>&lt;li&gt;Dance Floor Lighting&lt;/li&gt;</text:p>
      <text:p text:style-name="P1533"><text:s text:c="8"/>&lt;li&gt;Wedding Lighting&lt;/li&gt;</text:p>
      <text:p text:style-name="P1534"><text:s text:c="8"/>&lt;li&gt;Moving Heads&lt;/li&gt;</text:p>
      <text:p text:style-name="P1535"><text:s text:c="8"/>&lt;li&gt;LED PAR Lights&lt;/li&gt;</text:p>
      <text:p text:style-name="P1536"><text:s text:c="6"/>&lt;/ul&gt;</text:p>
      <text:p text:style-name="P1537"><text:s text:c="4"/>&lt;/div&gt;</text:p>
      <text:p text:style-name="P1538"><text:s text:c="4"/>&lt;div class="service-card reveal"&gt;</text:p>
      <text:p text:style-name="P1539"><text:s text:c="6"/>&lt;div class="service-icon"&gt;</text:p>
      <text:p text:style-name="P1540"><text:s text:c="8"/>&lt;svg viewBox="0 0 24 24" xmlns="http://www.w3.org/2000/svg"&gt;&lt;rect x="2" y="3" width="20" height="14" rx="2"/&gt;&lt;path d="M8 21h8M12 17v4"/&gt;&lt;/svg&gt;</text:p>
      <text:p text:style-name="P1541"><text:s text:c="6"/>&lt;/div&gt;</text:p>
      <text:p text:style-name="P1542"><text:s text:c="6"/>&lt;h3&gt;LED Wall &amp;amp; Visual Displays&lt;/h3&gt;</text:p>
      <text:p text:style-name="P1543"><text:s text:c="6"/>&lt;ul class="service-list"&gt;</text:p>
      <text:p text:style-name="P1544"><text:s text:c="8"/>&lt;li&gt;Event Presentations&lt;/li&gt;</text:p>
      <text:p text:style-name="P1545"><text:s text:c="8"/>&lt;li&gt;Corporate Events&lt;/li&gt;</text:p>
      <text:p text:style-name="P1546"><text:s text:c="8"/>&lt;li&gt;Weddings&lt;/li&gt;</text:p>
      <text:p text:style-name="P1547"><text:s text:c="8"/>&lt;li&gt;Live Streaming Screens&lt;/li&gt;</text:p>
      <text:soft-page-break/>
      <text:p text:style-name="P1548"><text:s text:c="8"/>&lt;li&gt;Sponsor Displays&lt;/li&gt;</text:p>
      <text:p text:style-name="P1549"><text:s text:c="8"/>&lt;li&gt;Entertainment Backdrops&lt;/li&gt;</text:p>
      <text:p text:style-name="P1550"><text:s text:c="6"/>&lt;/ul&gt;</text:p>
      <text:p text:style-name="P1551"><text:s text:c="4"/>&lt;/div&gt;</text:p>
      <text:p text:style-name="P1552"><text:s text:c="2"/>&lt;/div&gt;</text:p>
      <text:p text:style-name="P1553">&lt;/section&gt;</text:p>
      <text:p text:style-name="P1554"/>
      <text:p text:style-name="P1555">&lt;!-- WHY US --&gt;</text:p>
      <text:p text:style-name="P1556">&lt;section class="why section-pad" id="why"&gt;</text:p>
      <text:p text:style-name="P1557"><text:s text:c="2"/>&lt;div class="why-glow"&gt;&lt;/div&gt;</text:p>
      <text:p text:style-name="P1558"><text:s text:c="2"/>&lt;div class="section-header reveal"&gt;</text:p>
      <text:p text:style-name="P1559"><text:s text:c="4"/>&lt;span class="section-tag"&gt;Why Choose Us&lt;/span&gt;</text:p>
      <text:p text:style-name="P1560"><text:s text:c="4"/>&lt;h2 class="section-title"&gt;Why Clients Choose &lt;span&gt;N Audio&lt;/span&gt;&lt;/h2&gt;</text:p>
      <text:p text:style-name="P1561"><text:s text:c="4"/>&lt;div class="section-line"&gt;&lt;/div&gt;</text:p>
      <text:p text:style-name="P1562"><text:s text:c="2"/>&lt;/div&gt;</text:p>
      <text:p text:style-name="P1563"><text:s text:c="2"/>&lt;div class="why-grid"&gt;</text:p>
      <text:p text:style-name="P1564"><text:s text:c="4"/>&lt;div class="why-card reveal"&gt;</text:p>
      <text:p text:style-name="P1565"><text:s text:c="6"/>&lt;div class="why-num"&gt;01&lt;/div&gt;</text:p>
      <text:p text:style-name="P1566"><text:s text:c="6"/>&lt;h3&gt;Reliability&lt;/h3&gt;</text:p>
      <text:p text:style-name="P1567"><text:s text:c="6"/>&lt;p&gt;We arrive on time and ensure everything is working before your event starts. No last-minute surprises.&lt;/p&gt;</text:p>
      <text:p text:style-name="P1568"><text:s text:c="4"/>&lt;/div&gt;</text:p>
      <text:p text:style-name="P1569"><text:s text:c="4"/>&lt;div class="why-card reveal"&gt;</text:p>
      <text:p text:style-name="P1570"><text:s text:c="6"/>&lt;div class="why-num"&gt;02&lt;/div&gt;</text:p>
      <text:p text:style-name="P1571"><text:s text:c="6"/>&lt;h3&gt;Professional Team&lt;/h3&gt;</text:p>
      <text:p text:style-name="P1572"><text:s text:c="6"/>&lt;p&gt;Experienced technicians who know how to handle events of all sizes — from intimate gatherings to large festivals.&lt;/p&gt;</text:p>
      <text:p text:style-name="P1573"><text:s text:c="4"/>&lt;/div&gt;</text:p>
      <text:p text:style-name="P1574"><text:s text:c="4"/>&lt;div class="why-card reveal"&gt;</text:p>
      <text:p text:style-name="P1575"><text:s text:c="6"/>&lt;div class="why-num"&gt;03&lt;/div&gt;</text:p>
      <text:p text:style-name="P1576"><text:s text:c="6"/>&lt;h3&gt;High-Quality Equipment&lt;/h3&gt;</text:p>
      <text:p text:style-name="P1577"><text:s text:c="6"/>&lt;p&gt;Clean audio, professional lighting, and dependable performance. We invest in gear that delivers results.&lt;/p&gt;</text:p>
      <text:p text:style-name="P1578"><text:s text:c="4"/>&lt;/div&gt;</text:p>
      <text:p text:style-name="P1579"><text:s text:c="4"/>&lt;div class="why-card reveal"&gt;</text:p>
      <text:p text:style-name="P1580"><text:s text:c="6"/>&lt;div class="why-num"&gt;04&lt;/div&gt;</text:p>
      <text:p text:style-name="P1581"><text:s text:c="6"/>&lt;h3&gt;Stress-Free Experience&lt;/h3&gt;</text:p>
      <text:p text:style-name="P1582"><text:s text:c="6"/>&lt;p&gt;We handle setup, operation, and teardown. You focus on your guests — we handle the technical side.&lt;/p&gt;</text:p>
      <text:p text:style-name="P1583"><text:s text:c="4"/>&lt;/div&gt;</text:p>
      <text:soft-page-break/>
      <text:p text:style-name="P1584"><text:s text:c="2"/>&lt;/div&gt;</text:p>
      <text:p text:style-name="P1585">&lt;/section&gt;</text:p>
      <text:p text:style-name="P1586"/>
      <text:p text:style-name="P1587">&lt;!-- EVENTS --&gt;</text:p>
      <text:p text:style-name="P1588">&lt;section class="events section-pad" id="events"&gt;</text:p>
      <text:p text:style-name="P1589"><text:s text:c="2"/>&lt;div class="section-header reveal"&gt;</text:p>
      <text:p text:style-name="P1590"><text:s text:c="4"/>&lt;span class="section-tag"&gt;Events We Handle&lt;/span&gt;</text:p>
      <text:p text:style-name="P1591"><text:s text:c="4"/>&lt;h2 class="section-title"&gt;Events We've &lt;span&gt;Supported&lt;/span&gt;&lt;/h2&gt;</text:p>
      <text:p text:style-name="P1592"><text:s text:c="4"/>&lt;div class="section-line"&gt;&lt;/div&gt;</text:p>
      <text:p text:style-name="P1593"><text:s text:c="4"/>&lt;p class="section-desc"&gt;From intimate celebrations to large-scale productions, we've got you covered.&lt;/p&gt;</text:p>
      <text:p text:style-name="P1594"><text:s text:c="2"/>&lt;/div&gt;</text:p>
      <text:p text:style-name="P1595"><text:s text:c="2"/>&lt;div class="events-grid"&gt;</text:p>
      <text:p text:style-name="P1596"><text:s text:c="4"/>&lt;div class="event-card reveal"&gt;</text:p>
      <text:p text:style-name="P1597"><text:s text:c="6"/>&lt;div class="event-icon"&gt;</text:p>
      <text:p text:style-name="P1598"><text:s text:c="8"/>&lt;svg viewBox="0 0 24 24" xmlns="http://www.w3.org/2000/svg"&gt;&lt;path d="M20.84 4.61a5.5 5.5 0 0 0-7.78 0L12 5.67l-1.06-1.06a5.5 5.5 0 0 0-7.78 7.78l1.06 1.06L12 21.23l7.78-7.78 1.06-1.06a5.5 5.5 0 0 0 0-7.78z"/&gt;&lt;/svg&gt;</text:p>
      <text:p text:style-name="P1599"><text:s text:c="6"/>&lt;/div&gt;</text:p>
      <text:p text:style-name="P1600"><text:s text:c="6"/>&lt;h3&gt;Weddings&lt;/h3&gt;</text:p>
      <text:p text:style-name="P1601"><text:s text:c="6"/>&lt;p&gt;Elegant sound and lighting for your most special day.&lt;/p&gt;</text:p>
      <text:p text:style-name="P1602"><text:s text:c="4"/>&lt;/div&gt;</text:p>
      <text:p text:style-name="P1603"><text:s text:c="4"/>&lt;div class="event-card reveal"&gt;</text:p>
      <text:p text:style-name="P1604"><text:s text:c="6"/>&lt;div class="event-icon"&gt;</text:p>
      <text:p text:style-name="P1605"><text:s text:c="8"/>&lt;svg viewBox="0 0 24 24" xmlns="http://www.w3.org/2000/svg"&gt;&lt;rect x="2" y="7" width="20" height="14" rx="2"/&gt;&lt;path d="M16 7V5a2 2 0 0 0-2-2h-4a2 2 0 0 0-2 2v2"/&gt;&lt;line x1="12" y1="12" x2="12" y2="16"/&gt;&lt;line x1="10" y1="14" x2="14" y2="14"/&gt;&lt;/svg&gt;</text:p>
      <text:p text:style-name="P1606"><text:s text:c="6"/>&lt;/div&gt;</text:p>
      <text:p text:style-name="P1607"><text:s text:c="6"/>&lt;h3&gt;Corporate Events&lt;/h3&gt;</text:p>
      <text:p text:style-name="P1608"><text:s text:c="6"/>&lt;p&gt;Professional production that reflects your brand and impresses your guests.&lt;/p&gt;</text:p>
      <text:p text:style-name="P1609"><text:s text:c="4"/>&lt;/div&gt;</text:p>
      <text:p text:style-name="P1610"><text:s text:c="4"/>&lt;div class="event-card reveal"&gt;</text:p>
      <text:p text:style-name="P1611"><text:s text:c="6"/>&lt;div class="event-icon"&gt;</text:p>
      <text:p text:style-name="P1612"><text:s text:c="8"/>&lt;svg viewBox="0 0 24 24" xmlns="http://www.w3.org/2000/svg"&gt;&lt;path d="M9 18V5l12-2v13"/&gt;&lt;circle cx="6" cy="18" r="3"/&gt;&lt;circle cx="18" cy="16" r="3"/&gt;&lt;/svg&gt;</text:p>
      <text:p text:style-name="P1613"><text:s text:c="6"/>&lt;/div&gt;</text:p>
      <text:p text:style-name="P1614"><text:s text:c="6"/>&lt;h3&gt;Live Band Performances&lt;/h3&gt;</text:p>
      <text:p text:style-name="P1615"><text:s text:c="6"/>&lt;p&gt;Powerful sound and dynamic lighting for unforgettable shows.&lt;/p&gt;</text:p>
      <text:p text:style-name="P1616"><text:s text:c="4"/>&lt;/div&gt;</text:p>
      <text:soft-page-break/>
      <text:p text:style-name="P1617"><text:s text:c="4"/>&lt;div class="event-card reveal"&gt;</text:p>
      <text:p text:style-name="P1618"><text:s text:c="6"/>&lt;div class="event-icon"&gt;</text:p>
      <text:p text:style-name="P1619"><text:s text:c="8"/>&lt;svg viewBox="0 0 24 24" xmlns="http://www.w3.org/2000/svg"&gt;&lt;path d="M2 3h6a4 4 0 0 1 4 4v14a3 3 0 0 0-3-3H2z"/&gt;&lt;path d="M22 3h-6a4 4 0 0 0-4 4v14a3 3 0 0 1 3-3h7z"/&gt;&lt;/svg&gt;</text:p>
      <text:p text:style-name="P1620"><text:s text:c="6"/>&lt;/div&gt;</text:p>
      <text:p text:style-name="P1621"><text:s text:c="6"/>&lt;h3&gt;School &amp;amp; Government&lt;/h3&gt;</text:p>
      <text:p text:style-name="P1622"><text:s text:c="6"/>&lt;p&gt;Reliable setups for important community and official occasions.&lt;/p&gt;</text:p>
      <text:p text:style-name="P1623"><text:s text:c="4"/>&lt;/div&gt;</text:p>
      <text:p text:style-name="P1624"><text:s text:c="4"/>&lt;div class="event-card reveal"&gt;</text:p>
      <text:p text:style-name="P1625"><text:s text:c="6"/>&lt;div class="event-icon"&gt;</text:p>
      <text:p text:style-name="P1626"><text:s text:c="8"/>&lt;svg viewBox="0 0 24 24" xmlns="http://www.w3.org/2000/svg"&gt;&lt;circle cx="12" cy="12" r="10"/&gt;&lt;path d="M12 8v4l3 3"/&gt;&lt;/svg&gt;</text:p>
      <text:p text:style-name="P1627"><text:s text:c="6"/>&lt;/div&gt;</text:p>
      <text:p text:style-name="P1628"><text:s text:c="6"/>&lt;h3&gt;Birthdays&lt;/h3&gt;</text:p>
      <text:p text:style-name="P1629"><text:s text:c="6"/>&lt;p&gt;Create lasting memories with the perfect sound and light show.&lt;/p&gt;</text:p>
      <text:p text:style-name="P1630"><text:s text:c="4"/>&lt;/div&gt;</text:p>
      <text:p text:style-name="P1631"><text:s text:c="4"/>&lt;div class="event-card reveal"&gt;</text:p>
      <text:p text:style-name="P1632"><text:s text:c="6"/>&lt;div class="event-icon"&gt;</text:p>
      <text:p text:style-name="P1633"><text:s text:c="8"/>&lt;svg viewBox="0 0 24 24" xmlns="http://www.w3.org/2000/svg"&gt;&lt;polygon points="12 2 15.09 8.26 22 9.27 17 14.14 18.18 21.02 12 17.77 5.82 21.02 7 14.14 2 9.27 8.91 8.26 12 2"/&gt;&lt;/svg&gt;</text:p>
      <text:p text:style-name="P1634"><text:s text:c="6"/>&lt;/div&gt;</text:p>
      <text:p text:style-name="P1635"><text:s text:c="6"/>&lt;h3&gt;Community Festivals&lt;/h3&gt;</text:p>
      <text:p text:style-name="P1636"><text:s text:c="6"/>&lt;p&gt;Scalable systems built for large crowds and outdoor venues.&lt;/p&gt;</text:p>
      <text:p text:style-name="P1637"><text:s text:c="4"/>&lt;/div&gt;</text:p>
      <text:p text:style-name="P1638"><text:s text:c="2"/>&lt;/div&gt;</text:p>
      <text:p text:style-name="P1639">&lt;/section&gt;</text:p>
      <text:p text:style-name="P1640"/>
      <text:p text:style-name="P1641">&lt;!-- GALLERY --&gt;</text:p>
      <text:p text:style-name="P1642">&lt;section class="gallery section-pad" id="gallery"&gt;</text:p>
      <text:p text:style-name="P1643"><text:s text:c="2"/>&lt;div class="section-header reveal"&gt;</text:p>
      <text:p text:style-name="P1644"><text:s text:c="4"/>&lt;span class="section-tag"&gt;Portfolio&lt;/span&gt;</text:p>
      <text:p text:style-name="P1645"><text:s text:c="4"/>&lt;h2 class="section-title"&gt;Our &lt;span&gt;Gallery&lt;/span&gt;&lt;/h2&gt;</text:p>
      <text:p text:style-name="P1646"><text:s text:c="4"/>&lt;div class="section-line"&gt;&lt;/div&gt;</text:p>
      <text:p text:style-name="P1647"><text:s text:c="4"/>&lt;p class="section-desc"&gt;A glimpse into the events we've brought to life.&lt;/p&gt;</text:p>
      <text:p text:style-name="P1648"><text:s text:c="2"/>&lt;/div&gt;</text:p>
      <text:p text:style-name="P1649"><text:s text:c="2"/>&lt;div class="gallery-grid reveal"&gt;</text:p>
      <text:p text:style-name="P1650"><text:s text:c="4"/>&lt;div class="gallery-item"&gt;</text:p>
      <text:p text:style-name="P1651"><text:s text:c="6"/>&lt;div class="gallery-placeholder" style="aspect-ratio:2/1;"&gt;</text:p>
      <text:soft-page-break/>
      <text:p text:style-name="P1652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53"><text:s text:c="8"/>&lt;span class="gallery-label"&gt;Wedding Setup&lt;/span&gt;</text:p>
      <text:p text:style-name="P1654"><text:s text:c="6"/>&lt;/div&gt;</text:p>
      <text:p text:style-name="P1655"><text:s text:c="4"/>&lt;/div&gt;</text:p>
      <text:p text:style-name="P1656"><text:s text:c="4"/>&lt;div class="gallery-item"&gt;</text:p>
      <text:p text:style-name="P1657"><text:s text:c="6"/>&lt;div class="gallery-placeholder"&gt;</text:p>
      <text:p text:style-name="P1658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59"><text:s text:c="8"/>&lt;span class="gallery-label"&gt;Lighting Showcase&lt;/span&gt;</text:p>
      <text:p text:style-name="P1660"><text:s text:c="6"/>&lt;/div&gt;</text:p>
      <text:p text:style-name="P1661"><text:s text:c="4"/>&lt;/div&gt;</text:p>
      <text:p text:style-name="P1662"><text:s text:c="4"/>&lt;div class="gallery-item"&gt;</text:p>
      <text:p text:style-name="P1663"><text:s text:c="6"/>&lt;div class="gallery-placeholder"&gt;</text:p>
      <text:p text:style-name="P1664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65"><text:s text:c="8"/>&lt;span class="gallery-label"&gt;Corporate Event&lt;/span&gt;</text:p>
      <text:p text:style-name="P1666"><text:s text:c="6"/>&lt;/div&gt;</text:p>
      <text:p text:style-name="P1667"><text:s text:c="4"/>&lt;/div&gt;</text:p>
      <text:p text:style-name="P1668"><text:s text:c="4"/>&lt;div class="gallery-item"&gt;</text:p>
      <text:p text:style-name="P1669"><text:s text:c="6"/>&lt;div class="gallery-placeholder" style="aspect-ratio:2/1;"&gt;</text:p>
      <text:p text:style-name="P1670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71"><text:s text:c="8"/>&lt;span class="gallery-label"&gt;Band Performances&lt;/span&gt;</text:p>
      <text:p text:style-name="P1672"><text:s text:c="6"/>&lt;/div&gt;</text:p>
      <text:p text:style-name="P1673"><text:s text:c="4"/>&lt;/div&gt;</text:p>
      <text:p text:style-name="P1674"><text:s text:c="4"/>&lt;div class="gallery-item"&gt;</text:p>
      <text:p text:style-name="P1675"><text:s text:c="6"/>&lt;div class="gallery-placeholder"&gt;</text:p>
      <text:p text:style-name="P1676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77"><text:s text:c="8"/>&lt;span class="gallery-label"&gt;Birthday Event&lt;/span&gt;</text:p>
      <text:p text:style-name="P1678"><text:s text:c="6"/>&lt;/div&gt;</text:p>
      <text:p text:style-name="P1679"><text:s text:c="4"/>&lt;/div&gt;</text:p>
      <text:p text:style-name="P1680"><text:s text:c="4"/>&lt;div class="gallery-item"&gt;</text:p>
      <text:p text:style-name="P1681"><text:s text:c="6"/>&lt;div class="gallery-placeholder"&gt;</text:p>
      <text:soft-page-break/>
      <text:p text:style-name="P1682"><text:s text:c="8"/>&lt;svg viewBox="0 0 24 24" xmlns="http://www.w3.org/2000/svg"&gt;&lt;rect x="3" y="3" width="18" height="18" rx="2"/&gt;&lt;circle cx="8.5" cy="8.5" r="1.5"/&gt;&lt;polyline points="21 15 16 10 5 21"/&gt;&lt;/svg&gt;</text:p>
      <text:p text:style-name="P1683"><text:s text:c="8"/>&lt;span class="gallery-label"&gt;Festival Stage&lt;/span&gt;</text:p>
      <text:p text:style-name="P1684"><text:s text:c="6"/>&lt;/div&gt;</text:p>
      <text:p text:style-name="P1685"><text:s text:c="4"/>&lt;/div&gt;</text:p>
      <text:p text:style-name="P1686"><text:s text:c="2"/>&lt;/div&gt;</text:p>
      <text:p text:style-name="P1687">&lt;/section&gt;</text:p>
      <text:p text:style-name="P1688"/>
      <text:p text:style-name="P1689">&lt;!-- TESTIMONIALS --&gt;</text:p>
      <text:p text:style-name="P1690">&lt;section class="testimonials section-pad" id="testimonials"&gt;</text:p>
      <text:p text:style-name="P1691"><text:s text:c="2"/>&lt;div class="section-header reveal"&gt;</text:p>
      <text:p text:style-name="P1692"><text:s text:c="4"/>&lt;span class="section-tag"&gt;Client Reviews&lt;/span&gt;</text:p>
      <text:p text:style-name="P1693"><text:s text:c="4"/>&lt;h2 class="section-title"&gt;What Clients &lt;span&gt;Say&lt;/span&gt;&lt;/h2&gt;</text:p>
      <text:p text:style-name="P1694"><text:s text:c="4"/>&lt;div class="section-line"&gt;&lt;/div&gt;</text:p>
      <text:p text:style-name="P1695"><text:s text:c="2"/>&lt;/div&gt;</text:p>
      <text:p text:style-name="P1696"><text:s text:c="2"/>&lt;div class="testi-grid"&gt;</text:p>
      <text:p text:style-name="P1697"><text:s text:c="4"/>&lt;div class="testi-card reveal"&gt;</text:p>
      <text:p text:style-name="P1698"><text:s text:c="6"/>&lt;div class="testi-stars"&gt;</text:p>
      <text:p text:style-name="P1699"><text:s text:c="8"/>&lt;div class="star"&gt;&lt;/div&gt;&lt;div class="star"&gt;&lt;/div&gt;&lt;div class="star"&gt;&lt;/div&gt;&lt;div class="star"&gt;&lt;/div&gt;&lt;div class="star"&gt;&lt;/div&gt;</text:p>
      <text:p text:style-name="P1700"><text:s text:c="6"/>&lt;/div&gt;</text:p>
      <text:p text:style-name="P1701"><text:s text:c="6"/>&lt;p class="testi-quote"&gt;The sound quality was amazing and the team was very professional. Everyone at our wedding kept complimenting the audio and lights.&lt;/p&gt;</text:p>
      <text:p text:style-name="P1702"><text:s text:c="6"/>&lt;span class="testi-author"&gt;Wedding Client — Coron, Palawan&lt;/span&gt;</text:p>
      <text:p text:style-name="P1703"><text:s text:c="4"/>&lt;/div&gt;</text:p>
      <text:p text:style-name="P1704"><text:s text:c="4"/>&lt;div class="testi-card reveal"&gt;</text:p>
      <text:p text:style-name="P1705"><text:s text:c="6"/>&lt;div class="testi-stars"&gt;</text:p>
      <text:p text:style-name="P1706"><text:s text:c="8"/>&lt;div class="star"&gt;&lt;/div&gt;&lt;div class="star"&gt;&lt;/div&gt;&lt;div class="star"&gt;&lt;/div&gt;&lt;div class="star"&gt;&lt;/div&gt;&lt;div class="star"&gt;&lt;/div&gt;</text:p>
      <text:p text:style-name="P1707"><text:s text:c="6"/>&lt;/div&gt;</text:p>
      <text:p text:style-name="P1708"><text:s text:c="6"/>&lt;p class="testi-quote"&gt;They arrived early and everything went smoothly from start to finish. No technical issues whatsoever — just a flawless event.&lt;/p&gt;</text:p>
      <text:p text:style-name="P1709"><text:s text:c="6"/>&lt;span class="testi-author"&gt;Corporate Client — Palawan&lt;/span&gt;</text:p>
      <text:p text:style-name="P1710"><text:s text:c="4"/>&lt;/div&gt;</text:p>
      <text:p text:style-name="P1711"><text:s text:c="4"/>&lt;div class="testi-card reveal"&gt;</text:p>
      <text:p text:style-name="P1712"><text:s text:c="6"/>&lt;div class="testi-stars"&gt;</text:p>
      <text:p text:style-name="P1713"><text:s text:c="8"/>&lt;div class="star"&gt;&lt;/div&gt;&lt;div class="star"&gt;&lt;/div&gt;&lt;div class="star"&gt;&lt;/div&gt;&lt;div class="star"&gt;&lt;/div&gt;&lt;div class="star"&gt;&lt;/div&gt;</text:p>
      <text:p text:style-name="P1714"><text:s text:c="6"/>&lt;/div&gt;</text:p>
      <text:soft-page-break/>
      <text:p text:style-name="P1715"><text:s text:c="6"/>&lt;p class="testi-quote"&gt;Highly recommended for weddings and large events. The lighting design transformed our venue completely. Outstanding work!&lt;/p&gt;</text:p>
      <text:p text:style-name="P1716"><text:s text:c="6"/>&lt;span class="testi-author"&gt;Birthday Event Client — Coron&lt;/span&gt;</text:p>
      <text:p text:style-name="P1717"><text:s text:c="4"/>&lt;/div&gt;</text:p>
      <text:p text:style-name="P1718"><text:s text:c="2"/>&lt;/div&gt;</text:p>
      <text:p text:style-name="P1719">&lt;/section&gt;</text:p>
      <text:p text:style-name="P1720"/>
      <text:p text:style-name="P1721">&lt;!-- PACKAGES --&gt;</text:p>
      <text:p text:style-name="P1722">&lt;section class="packages section-pad" id="packages"&gt;</text:p>
      <text:p text:style-name="P1723"><text:s text:c="2"/>&lt;div class="section-header reveal"&gt;</text:p>
      <text:p text:style-name="P1724"><text:s text:c="4"/>&lt;span class="section-tag"&gt;Pricing&lt;/span&gt;</text:p>
      <text:p text:style-name="P1725"><text:s text:c="4"/>&lt;h2 class="section-title"&gt;Event &lt;span&gt;Packages&lt;/span&gt;&lt;/h2&gt;</text:p>
      <text:p text:style-name="P1726"><text:s text:c="4"/>&lt;div class="section-line"&gt;&lt;/div&gt;</text:p>
      <text:p text:style-name="P1727"><text:s text:c="4"/>&lt;p class="section-desc"&gt;Flexible packages for every event size and budget. Custom options available.&lt;/p&gt;</text:p>
      <text:p text:style-name="P1728"><text:s text:c="2"/>&lt;/div&gt;</text:p>
      <text:p text:style-name="P1729"><text:s text:c="2"/>&lt;div class="packages-grid"&gt;</text:p>
      <text:p text:style-name="P1730"><text:s text:c="4"/>&lt;div class="pkg-card reveal"&gt;</text:p>
      <text:p text:style-name="P1731"><text:s text:c="6"/>&lt;div class="pkg-name"&gt;Basic&lt;/div&gt;</text:p>
      <text:p text:style-name="P1732"><text:s text:c="6"/>&lt;div class="pkg-tagline"&gt;Perfect for small gatherings&lt;/div&gt;</text:p>
      <text:p text:style-name="P1733"><text:s text:c="6"/>&lt;div class="pkg-price"&gt;Starting at P ____&lt;/div&gt;</text:p>
      <text:p text:style-name="P1734"><text:s text:c="6"/>&lt;ul class="pkg-features"&gt;</text:p>
      <text:p text:style-name="P1735"><text:s text:c="8"/>&lt;li&gt;&lt;div class="pkg-check"&gt;&lt;svg viewBox="0 0 12 12" fill="none" xmlns="http://www.w3.org/2000/svg"&gt;&lt;path d="M2 6l3 3 5-5" stroke="#52b36b" stroke-width="1.5" stroke-linecap="round" stroke-linejoin="round"/&gt;&lt;/svg&gt;&lt;/div&gt; Sound System&lt;/li&gt;</text:p>
      <text:p text:style-name="P1736"><text:s text:c="8"/>&lt;li&gt;&lt;div class="pkg-check"&gt;&lt;svg viewBox="0 0 12 12" fill="none" xmlns="http://www.w3.org/2000/svg"&gt;&lt;path d="M2 6l3 3 5-5" stroke="#52b36b" stroke-width="1.5" stroke-linecap="round" stroke-linejoin="round"/&gt;&lt;/svg&gt;&lt;/div&gt; Wireless Microphones&lt;/li&gt;</text:p>
      <text:p text:style-name="P1737"><text:s text:c="8"/>&lt;li&gt;&lt;div class="pkg-check"&gt;&lt;svg viewBox="0 0 12 12" fill="none" xmlns="http://www.w3.org/2000/svg"&gt;&lt;path d="M2 6l3 3 5-5" stroke="#52b36b" stroke-width="1.5" stroke-linecap="round" stroke-linejoin="round"/&gt;&lt;/svg&gt;&lt;/div&gt; On-Site Technician&lt;/li&gt;</text:p>
      <text:p text:style-name="P1738"><text:s text:c="8"/>&lt;li&gt;&lt;div class="pkg-check"&gt;&lt;svg viewBox="0 0 12 12" fill="none" xmlns="http://www.w3.org/2000/svg"&gt;&lt;path d="M2 6l3 3 5-5" stroke="#52b36b" stroke-width="1.5" stroke-linecap="round" stroke-linejoin="round"/&gt;&lt;/svg&gt;&lt;/div&gt; Setup &amp;amp; Teardown&lt;/li&gt;</text:p>
      <text:p text:style-name="P1739"><text:s text:c="6"/>&lt;/ul&gt;</text:p>
      <text:soft-page-break/>
      <text:p text:style-name="P1740"><text:s text:c="6"/>&lt;a href="#contact" class="btn-outline" style="display:block;text-align:center;"&gt;Get a Quote&lt;/a&gt;</text:p>
      <text:p text:style-name="P1741"><text:s text:c="4"/>&lt;/div&gt;</text:p>
      <text:p text:style-name="P1742"><text:s text:c="4"/>&lt;div class="pkg-card featured reveal"&gt;</text:p>
      <text:p text:style-name="P1743"><text:s text:c="6"/>&lt;div class="pkg-name"&gt;Premium&lt;/div&gt;</text:p>
      <text:p text:style-name="P1744"><text:s text:c="6"/>&lt;div class="pkg-tagline"&gt;Perfect for weddings and corporate events&lt;/div&gt;</text:p>
      <text:p text:style-name="P1745"><text:s text:c="6"/>&lt;div class="pkg-price"&gt;Starting at P ____&lt;/div&gt;</text:p>
      <text:p text:style-name="P1746"><text:s text:c="6"/>&lt;ul class="pkg-features"&gt;</text:p>
      <text:p text:style-name="P1747"><text:s text:c="8"/>&lt;li&gt;&lt;div class="pkg-check"&gt;&lt;svg viewBox="0 0 12 12" fill="none" xmlns="http://www.w3.org/2000/svg"&gt;&lt;path d="M2 6l3 3 5-5" stroke="#52b36b" stroke-width="1.5" stroke-linecap="round" stroke-linejoin="round"/&gt;&lt;/svg&gt;&lt;/div&gt; Full Sound System&lt;/li&gt;</text:p>
      <text:p text:style-name="P1748"><text:s text:c="8"/>&lt;li&gt;&lt;div class="pkg-check"&gt;&lt;svg viewBox="0 0 12 12" fill="none" xmlns="http://www.w3.org/2000/svg"&gt;&lt;path d="M2 6l3 3 5-5" stroke="#52b36b" stroke-width="1.5" stroke-linecap="round" stroke-linejoin="round"/&gt;&lt;/svg&gt;&lt;/div&gt; Professional Lighting&lt;/li&gt;</text:p>
      <text:p text:style-name="P1749"><text:s text:c="8"/>&lt;li&gt;&lt;div class="pkg-check"&gt;&lt;svg viewBox="0 0 12 12" fill="none" xmlns="http://www.w3.org/2000/svg"&gt;&lt;path d="M2 6l3 3 5-5" stroke="#52b36b" stroke-width="1.5" stroke-linecap="round" stroke-linejoin="round"/&gt;&lt;/svg&gt;&lt;/div&gt; Wireless Microphones&lt;/li&gt;</text:p>
      <text:p text:style-name="P1750"><text:s text:c="8"/>&lt;li&gt;&lt;div class="pkg-check"&gt;&lt;svg viewBox="0 0 12 12" fill="none" xmlns="http://www.w3.org/2000/svg"&gt;&lt;path d="M2 6l3 3 5-5" stroke="#52b36b" stroke-width="1.5" stroke-linecap="round" stroke-linejoin="round"/&gt;&lt;/svg&gt;&lt;/div&gt; Technician Team&lt;/li&gt;</text:p>
      <text:p text:style-name="P1751"><text:s text:c="8"/>&lt;li&gt;&lt;div class="pkg-check"&gt;&lt;svg viewBox="0 0 12 12" fill="none" xmlns="http://www.w3.org/2000/svg"&gt;&lt;path d="M2 6l3 3 5-5" stroke="#52b36b" stroke-width="1.5" stroke-linecap="round" stroke-linejoin="round"/&gt;&lt;/svg&gt;&lt;/div&gt; Setup &amp;amp; Teardown&lt;/li&gt;</text:p>
      <text:p text:style-name="P1752"><text:s text:c="6"/>&lt;/ul&gt;</text:p>
      <text:p text:style-name="P1753"><text:s text:c="6"/>&lt;a href="#contact" class="btn-primary" style="display:block;text-align:center;"&gt;Get a Quote&lt;/a&gt;</text:p>
      <text:p text:style-name="P1754"><text:s text:c="4"/>&lt;/div&gt;</text:p>
      <text:p text:style-name="P1755"><text:s text:c="4"/>&lt;div class="pkg-card reveal"&gt;</text:p>
      <text:p text:style-name="P1756"><text:s text:c="6"/>&lt;div class="pkg-name"&gt;Complete&lt;/div&gt;</text:p>
      <text:p text:style-name="P1757"><text:s text:c="6"/>&lt;div class="pkg-tagline"&gt;Ideal for large events&lt;/div&gt;</text:p>
      <text:p text:style-name="P1758"><text:s text:c="6"/>&lt;div class="pkg-price"&gt;Starting at P ____&lt;/div&gt;</text:p>
      <text:p text:style-name="P1759"><text:s text:c="6"/>&lt;ul class="pkg-features"&gt;</text:p>
      <text:p text:style-name="P1760"><text:s text:c="8"/>&lt;li&gt;&lt;div class="pkg-check"&gt;&lt;svg viewBox="0 0 12 12" fill="none" xmlns="http://www.w3.org/2000/svg"&gt;&lt;path d="M2 6l3 3 5-5" stroke="#52b36b"<text:s/><text:soft-page-break/>stroke-width="1.5" stroke-linecap="round" stroke-linejoin="round"/&gt;&lt;/svg&gt;&lt;/div&gt; Full Sound System&lt;/li&gt;</text:p>
      <text:p text:style-name="P1761"><text:s text:c="8"/>&lt;li&gt;&lt;div class="pkg-check"&gt;&lt;svg viewBox="0 0 12 12" fill="none" xmlns="http://www.w3.org/2000/svg"&gt;&lt;path d="M2 6l3 3 5-5" stroke="#52b36b" stroke-width="1.5" stroke-linecap="round" stroke-linejoin="round"/&gt;&lt;/svg&gt;&lt;/div&gt; Professional Lighting&lt;/li&gt;</text:p>
      <text:p text:style-name="P1762"><text:s text:c="8"/>&lt;li&gt;&lt;div class="pkg-check"&gt;&lt;svg viewBox="0 0 12 12" fill="none" xmlns="http://www.w3.org/2000/svg"&gt;&lt;path d="M2 6l3 3 5-5" stroke="#52b36b" stroke-width="1.5" stroke-linecap="round" stroke-linejoin="round"/&gt;&lt;/svg&gt;&lt;/div&gt; LED Wall Display&lt;/li&gt;</text:p>
      <text:p text:style-name="P1763"><text:s text:c="8"/>&lt;li&gt;&lt;div class="pkg-check"&gt;&lt;svg viewBox="0 0 12 12" fill="none" xmlns="http://www.w3.org/2000/svg"&gt;&lt;path d="M2 6l3 3 5-5" stroke="#52b36b" stroke-width="1.5" stroke-linecap="round" stroke-linejoin="round"/&gt;&lt;/svg&gt;&lt;/div&gt; Full Technical Crew&lt;/li&gt;</text:p>
      <text:p text:style-name="P1764"><text:s text:c="8"/>&lt;li&gt;&lt;div class="pkg-check"&gt;&lt;svg viewBox="0 0 12 12" fill="none" xmlns="http://www.w3.org/2000/svg"&gt;&lt;path d="M2 6l3 3 5-5" stroke="#52b36b" stroke-width="1.5" stroke-linecap="round" stroke-linejoin="round"/&gt;&lt;/svg&gt;&lt;/div&gt; Setup &amp;amp; Teardown&lt;/li&gt;</text:p>
      <text:p text:style-name="P1765"><text:s text:c="8"/>&lt;li&gt;&lt;div class="pkg-check"&gt;&lt;svg viewBox="0 0 12 12" fill="none" xmlns="http://www.w3.org/2000/svg"&gt;&lt;path d="M2 6l3 3 5-5" stroke="#52b36b" stroke-width="1.5" stroke-linecap="round" stroke-linejoin="round"/&gt;&lt;/svg&gt;&lt;/div&gt; Custom Configuration&lt;/li&gt;</text:p>
      <text:p text:style-name="P1766"><text:s text:c="6"/>&lt;/ul&gt;</text:p>
      <text:p text:style-name="P1767"><text:s text:c="6"/>&lt;a href="#contact" class="btn-outline" style="display:block;text-align:center;"&gt;Get a Quote&lt;/a&gt;</text:p>
      <text:p text:style-name="P1768"><text:s text:c="4"/>&lt;/div&gt;</text:p>
      <text:p text:style-name="P1769"><text:s text:c="2"/>&lt;/div&gt;</text:p>
      <text:p text:style-name="P1770">&lt;/section&gt;</text:p>
      <text:p text:style-name="P1771"/>
      <text:p text:style-name="P1772">&lt;!-- FAQ --&gt;</text:p>
      <text:p text:style-name="P1773">&lt;section class="faq section-pad" id="faq"&gt;</text:p>
      <text:p text:style-name="P1774"><text:s text:c="2"/>&lt;div class="section-header reveal"&gt;</text:p>
      <text:p text:style-name="P1775"><text:s text:c="4"/>&lt;span class="section-tag"&gt;Common Questions&lt;/span&gt;</text:p>
      <text:p text:style-name="P1776"><text:s text:c="4"/>&lt;h2 class="section-title"&gt;Frequently Asked &lt;span&gt;Questions&lt;/span&gt;&lt;/h2&gt;</text:p>
      <text:p text:style-name="P1777"><text:s text:c="4"/>&lt;div class="section-line"&gt;&lt;/div&gt;</text:p>
      <text:p text:style-name="P1778"><text:s text:c="2"/>&lt;/div&gt;</text:p>
      <text:p text:style-name="P1779"><text:s text:c="2"/>&lt;div class="faq-inner reveal"&gt;</text:p>
      <text:p text:style-name="P1780"><text:s text:c="4"/>&lt;div class="faq-item open"&gt;</text:p>
      <text:p text:style-name="P1781"><text:s text:c="6"/>&lt;button class="faq-question" onclick="toggleFaq(this)"&gt;</text:p>
      <text:p text:style-name="P1782"><text:s text:c="8"/>Do you travel outside Coron?</text:p>
      <text:soft-page-break/>
      <text:p text:style-name="P1783"><text:s text:c="8"/>&lt;div class="faq-icon"&gt;</text:p>
      <text:p text:style-name="P1784"><text:s text:c="10"/>&lt;svg viewBox="0 0 12 12" xmlns="http://www.w3.org/2000/svg"&gt;&lt;path d="M2 4l4 4 4-4" stroke="#52b36b" stroke-width="1.5" stroke-linecap="round" fill="none"/&gt;&lt;/svg&gt;</text:p>
      <text:p text:style-name="P1785"><text:s text:c="8"/>&lt;/div&gt;</text:p>
      <text:p text:style-name="P1786"><text:s text:c="6"/>&lt;/button&gt;</text:p>
      <text:p text:style-name="P1787"><text:s text:c="6"/>&lt;div class="faq-answer"&gt;Yes. We serve Coron and nearby areas in Palawan. Contact us to discuss your location and we will work out the best arrangement.&lt;/div&gt;</text:p>
      <text:p text:style-name="P1788"><text:s text:c="4"/>&lt;/div&gt;</text:p>
      <text:p text:style-name="P1789"><text:s text:c="4"/>&lt;div class="faq-item"&gt;</text:p>
      <text:p text:style-name="P1790"><text:s text:c="6"/>&lt;button class="faq-question" onclick="toggleFaq(this)"&gt;</text:p>
      <text:p text:style-name="P1791"><text:s text:c="8"/>How early should I book?</text:p>
      <text:p text:style-name="P1792"><text:s text:c="8"/>&lt;div class="faq-icon"&gt;</text:p>
      <text:p text:style-name="P1793"><text:s text:c="10"/>&lt;svg viewBox="0 0 12 12" xmlns="http://www.w3.org/2000/svg"&gt;&lt;path d="M2 4l4 4 4-4" stroke="#52b36b" stroke-width="1.5" stroke-linecap="round" fill="none"/&gt;&lt;/svg&gt;</text:p>
      <text:p text:style-name="P1794"><text:s text:c="8"/>&lt;/div&gt;</text:p>
      <text:p text:style-name="P1795"><text:s text:c="6"/>&lt;/button&gt;</text:p>
      <text:p text:style-name="P1796"><text:s text:c="6"/>&lt;div class="faq-answer"&gt;We recommend booking at least 2 to 4 weeks in advance. For peak season dates like holidays and weekends, earlier is better to secure your preferred date.&lt;/div&gt;</text:p>
      <text:p text:style-name="P1797"><text:s text:c="4"/>&lt;/div&gt;</text:p>
      <text:p text:style-name="P1798"><text:s text:c="4"/>&lt;div class="faq-item"&gt;</text:p>
      <text:p text:style-name="P1799"><text:s text:c="6"/>&lt;button class="faq-question" onclick="toggleFaq(this)"&gt;</text:p>
      <text:p text:style-name="P1800"><text:s text:c="8"/>Do you provide technicians?</text:p>
      <text:p text:style-name="P1801"><text:s text:c="8"/>&lt;div class="faq-icon"&gt;</text:p>
      <text:p text:style-name="P1802"><text:s text:c="10"/>&lt;svg viewBox="0 0 12 12" xmlns="http://www.w3.org/2000/svg"&gt;&lt;path d="M2 4l4 4 4-4" stroke="#52b36b" stroke-width="1.5" stroke-linecap="round" fill="none"/&gt;&lt;/svg&gt;</text:p>
      <text:p text:style-name="P1803"><text:s text:c="8"/>&lt;/div&gt;</text:p>
      <text:p text:style-name="P1804"><text:s text:c="6"/>&lt;/button&gt;</text:p>
      <text:p text:style-name="P1805"><text:s text:c="6"/>&lt;div class="faq-answer"&gt;Yes. Every package includes professional technical support. Our team handles the setup, operation throughout the event, and full teardown afterward.&lt;/div&gt;</text:p>
      <text:p text:style-name="P1806"><text:s text:c="4"/>&lt;/div&gt;</text:p>
      <text:p text:style-name="P1807"><text:s text:c="4"/>&lt;div class="faq-item"&gt;</text:p>
      <text:p text:style-name="P1808"><text:s text:c="6"/>&lt;button class="faq-question" onclick="toggleFaq(this)"&gt;</text:p>
      <text:p text:style-name="P1809"><text:s text:c="8"/>Can you customize packages?</text:p>
      <text:p text:style-name="P1810"><text:s text:c="8"/>&lt;div class="faq-icon"&gt;</text:p>
      <text:soft-page-break/>
      <text:p text:style-name="P1811"><text:s text:c="10"/>&lt;svg viewBox="0 0 12 12" xmlns="http://www.w3.org/2000/svg"&gt;&lt;path d="M2 4l4 4 4-4" stroke="#52b36b" stroke-width="1.5" stroke-linecap="round" fill="none"/&gt;&lt;/svg&gt;</text:p>
      <text:p text:style-name="P1812"><text:s text:c="8"/>&lt;/div&gt;</text:p>
      <text:p text:style-name="P1813"><text:s text:c="6"/>&lt;/button&gt;</text:p>
      <text:p text:style-name="P1814"><text:s text:c="6"/>&lt;div class="faq-answer"&gt;Absolutely. We tailor packages to your specific event requirements. Contact us with your event details and we will build the perfect solution for you.&lt;/div&gt;</text:p>
      <text:p text:style-name="P1815"><text:s text:c="4"/>&lt;/div&gt;</text:p>
      <text:p text:style-name="P1816"><text:s text:c="2"/>&lt;/div&gt;</text:p>
      <text:p text:style-name="P1817">&lt;/section&gt;</text:p>
      <text:p text:style-name="P1818"/>
      <text:p text:style-name="P1819">&lt;!-- URGENCY --&gt;</text:p>
      <text:p text:style-name="P1820">&lt;div class="urgency"&gt;</text:p>
      <text:p text:style-name="P1821"><text:s text:c="2"/>&lt;div style="display:flex;justify-content:center;margin-bottom:20px;"&gt;</text:p>
      <text:p text:style-name="P1822"><text:s text:c="4"/>&lt;div class="eq-bars"&gt;</text:p>
      <text:p text:style-name="P1823"><text:s text:c="6"/>&lt;div class="eq-bar" style="height:60%"&gt;&lt;/div&gt;</text:p>
      <text:p text:style-name="P1824"><text:s text:c="6"/>&lt;div class="eq-bar" style="height:90%"&gt;&lt;/div&gt;</text:p>
      <text:p text:style-name="P1825"><text:s text:c="6"/>&lt;div class="eq-bar" style="height:40%"&gt;&lt;/div&gt;</text:p>
      <text:p text:style-name="P1826"><text:s text:c="6"/>&lt;div class="eq-bar" style="height:75%"&gt;&lt;/div&gt;</text:p>
      <text:p text:style-name="P1827"><text:s text:c="6"/>&lt;div class="eq-bar" style="height:55%"&gt;&lt;/div&gt;</text:p>
      <text:p text:style-name="P1828"><text:s text:c="6"/>&lt;div class="eq-bar" style="height:85%"&gt;&lt;/div&gt;</text:p>
      <text:p text:style-name="P1829"><text:s text:c="6"/>&lt;div class="eq-bar" style="height:30%"&gt;&lt;/div&gt;</text:p>
      <text:p text:style-name="P1830"><text:s text:c="4"/>&lt;/div&gt;</text:p>
      <text:p text:style-name="P1831"><text:s text:c="2"/>&lt;/div&gt;</text:p>
      <text:p text:style-name="P1832"><text:s text:c="2"/>&lt;h2&gt;Limited Dates &lt;span&gt;Available&lt;/span&gt;&lt;/h2&gt;</text:p>
      <text:p text:style-name="P1833"><text:s text:c="2"/>&lt;p&gt;Popular dates get booked quickly. Secure your event date today before it is taken.&lt;/p&gt;</text:p>
      <text:p text:style-name="P1834"><text:s text:c="2"/>&lt;a href="#contact" class="btn-primary"&gt;Secure My Date Now&lt;/a&gt;</text:p>
      <text:p text:style-name="P1835">&lt;/div&gt;</text:p>
      <text:p text:style-name="P1836"/>
      <text:p text:style-name="P1837">&lt;!-- CONTACT --&gt;</text:p>
      <text:p text:style-name="P1838">&lt;section class="contact section-pad" id="contact"&gt;</text:p>
      <text:p text:style-name="P1839"><text:s text:c="2"/>&lt;div class="contact-inner"&gt;</text:p>
      <text:p text:style-name="P1840"><text:s text:c="4"/>&lt;div class="contact-info reveal"&gt;</text:p>
      <text:p text:style-name="P1841"><text:s text:c="6"/>&lt;h2&gt;Get Your&lt;br&gt;&lt;span&gt;Free Quote&lt;/span&gt;&lt;/h2&gt;</text:p>
      <text:p text:style-name="P1842"><text:s text:c="6"/>&lt;p&gt;Tell us about your event and we will put together the perfect package for you. No obligation, no pressure — just professional advice.&lt;/p&gt;</text:p>
      <text:p text:style-name="P1843"><text:s text:c="6"/>&lt;div class="contact-details"&gt;</text:p>
      <text:p text:style-name="P1844"><text:s text:c="8"/>&lt;div class="contact-detail"&gt;</text:p>
      <text:soft-page-break/>
      <text:p text:style-name="P1845"><text:s text:c="10"/>&lt;div class="contact-detail-icon"&gt;</text:p>
      <text:p text:style-name="P1846"><text:s text:c="12"/>&lt;svg viewBox="0 0 24 24" xmlns="http://www.w3.org/2000/svg"&gt;&lt;path d="M22 16.92v3a2 2 0 0 1-2.18 2 19.79 19.79 0 0 1-8.63-3.07 19.5 19.5 0 0 1-6-6 19.79 19.79 0 0 1-3.07-8.67A2 2 0 0 1 4.11 2h3a2 2 0 0 1 2 1.72 12.84 12.84 0 0 0 .7 2.81 2 2 0 0 1-.45 2.11L8.09 9.91a16 16 0 0 0 6 6l1.27-1.27a2 2 0 0 1 2.11-.45 12.84 12.84 0 0 0 2.81.7A2 2 0 0 1 22 16.92z"/&gt;&lt;/svg&gt;</text:p>
      <text:p text:style-name="P1847"><text:s text:c="10"/>&lt;/div&gt;</text:p>
      <text:p text:style-name="P1848"><text:s text:c="10"/>&lt;div&gt;</text:p>
      <text:p text:style-name="P1849"><text:s text:c="12"/>&lt;span class="contact-detail-label"&gt;Phone / WhatsApp&lt;/span&gt;</text:p>
      <text:p text:style-name="P1850"><text:s text:c="12"/>&lt;div class="contact-detail-value"&gt;09481129862&lt;/div&gt;</text:p>
      <text:p text:style-name="P1851"><text:s text:c="10"/>&lt;/div&gt;</text:p>
      <text:p text:style-name="P1852"><text:s text:c="8"/>&lt;/div&gt;</text:p>
      <text:p text:style-name="P1853"><text:s text:c="8"/>&lt;div class="contact-detail"&gt;</text:p>
      <text:p text:style-name="P1854"><text:s text:c="10"/>&lt;div class="contact-detail-icon"&gt;</text:p>
      <text:p text:style-name="P1855"><text:s text:c="12"/>&lt;svg viewBox="0 0 24 24" xmlns="http://www.w3.org/2000/svg"&gt;&lt;path d="M4 4h16c1.1 0 2 .9 2 2v12c0 1.1-.9 2-2 2H4c-1.1 0-2-.9-2-2V6c0-1.1.9-2 2-2z"/&gt;&lt;polyline points="22,6 12,13 2,6"/&gt;&lt;/svg&gt;</text:p>
      <text:p text:style-name="P1856"><text:s text:c="10"/>&lt;/div&gt;</text:p>
      <text:p text:style-name="P1857"><text:s text:c="10"/>&lt;div&gt;</text:p>
      <text:p text:style-name="P1858"><text:s text:c="12"/>&lt;span class="contact-detail-label"&gt;Email&lt;/span&gt;</text:p>
      <text:p text:style-name="P1859"><text:s text:c="12"/>&lt;div class="contact-detail-value"&gt;nercuadaniel58@gmail.com&lt;/div&gt;</text:p>
      <text:p text:style-name="P1860"><text:s text:c="10"/>&lt;/div&gt;</text:p>
      <text:p text:style-name="P1861"><text:s text:c="8"/>&lt;/div&gt;</text:p>
      <text:p text:style-name="P1862"><text:s text:c="8"/>&lt;div class="contact-detail"&gt;</text:p>
      <text:p text:style-name="P1863"><text:s text:c="10"/>&lt;div class="contact-detail-icon"&gt;</text:p>
      <text:p text:style-name="P1864"><text:s text:c="12"/>&lt;svg viewBox="0 0 24 24" xmlns="http://www.w3.org/2000/svg"&gt;&lt;path d="M21 10c0 7-9 13-9 13s-9-6-9-13a9 9 0 0 1 18 0z"/&gt;&lt;circle cx="12" cy="10" r="3"/&gt;&lt;/svg&gt;</text:p>
      <text:p text:style-name="P1865"><text:s text:c="10"/>&lt;/div&gt;</text:p>
      <text:p text:style-name="P1866"><text:s text:c="10"/>&lt;div&gt;</text:p>
      <text:p text:style-name="P1867"><text:s text:c="12"/>&lt;span class="contact-detail-label"&gt;Location&lt;/span&gt;</text:p>
      <text:p text:style-name="P1868"><text:s text:c="12"/>&lt;div class="contact-detail-value"&gt;Coron, Palawan&lt;/div&gt;</text:p>
      <text:p text:style-name="P1869"><text:s text:c="10"/>&lt;/div&gt;</text:p>
      <text:p text:style-name="P1870"><text:s text:c="8"/>&lt;/div&gt;</text:p>
      <text:p text:style-name="P1871"><text:s text:c="6"/>&lt;/div&gt;</text:p>
      <text:p text:style-name="P1872"><text:s text:c="4"/>&lt;/div&gt;</text:p>
      <text:p text:style-name="P1873"><text:s text:c="4"/>&lt;div class="contact-form reveal"&gt;</text:p>
      <text:p text:style-name="P1874"><text:s text:c="6"/>&lt;div class="form-row"&gt;</text:p>
      <text:p text:style-name="P1875"><text:s text:c="8"/>&lt;div&gt;</text:p>
      <text:p text:style-name="P1876"><text:s text:c="10"/>&lt;label class="form-label"&gt;Your Name&lt;/label&gt;</text:p>
      <text:p text:style-name="P1877"><text:s text:c="10"/>&lt;input type="text" class="form-input" placeholder="Juan dela Cruz" /&gt;</text:p>
      <text:soft-page-break/>
      <text:p text:style-name="P1878"><text:s text:c="8"/>&lt;/div&gt;</text:p>
      <text:p text:style-name="P1879"><text:s text:c="8"/>&lt;div&gt;</text:p>
      <text:p text:style-name="P1880"><text:s text:c="10"/>&lt;label class="form-label"&gt;Contact Number&lt;/label&gt;</text:p>
      <text:p text:style-name="P1881"><text:s text:c="10"/>&lt;input type="tel" class="form-input" placeholder="09XXXXXXXXX" /&gt;</text:p>
      <text:p text:style-name="P1882"><text:s text:c="8"/>&lt;/div&gt;</text:p>
      <text:p text:style-name="P1883"><text:s text:c="6"/>&lt;/div&gt;</text:p>
      <text:p text:style-name="P1884"><text:s text:c="6"/>&lt;div class="form-group"&gt;</text:p>
      <text:p text:style-name="P1885"><text:s text:c="8"/>&lt;label class="form-label"&gt;Email Address&lt;/label&gt;</text:p>
      <text:p text:style-name="P1886"><text:s text:c="8"/>&lt;input type="email" class="form-input" placeholder="your@email.com" /&gt;</text:p>
      <text:p text:style-name="P1887"><text:s text:c="6"/>&lt;/div&gt;</text:p>
      <text:p text:style-name="P1888"><text:s text:c="6"/>&lt;div class="form-row"&gt;</text:p>
      <text:p text:style-name="P1889"><text:s text:c="8"/>&lt;div&gt;</text:p>
      <text:p text:style-name="P1890"><text:s text:c="10"/>&lt;label class="form-label"&gt;Event Type&lt;/label&gt;</text:p>
      <text:p text:style-name="P1891"><text:s text:c="10"/>&lt;select class="form-select"&gt;</text:p>
      <text:p text:style-name="P1892"><text:s text:c="12"/>&lt;option value=""&gt;Select event type...&lt;/option&gt;</text:p>
      <text:p text:style-name="P1893"><text:s text:c="12"/>&lt;option&gt;Wedding&lt;/option&gt;</text:p>
      <text:p text:style-name="P1894"><text:s text:c="12"/>&lt;option&gt;Birthday&lt;/option&gt;</text:p>
      <text:p text:style-name="P1895"><text:s text:c="12"/>&lt;option&gt;Corporate Event&lt;/option&gt;</text:p>
      <text:p text:style-name="P1896"><text:s text:c="12"/>&lt;option&gt;Live Band Performance&lt;/option&gt;</text:p>
      <text:p text:style-name="P1897"><text:s text:c="12"/>&lt;option&gt;School Program&lt;/option&gt;</text:p>
      <text:p text:style-name="P1898"><text:s text:c="12"/>&lt;option&gt;Government Event&lt;/option&gt;</text:p>
      <text:p text:style-name="P1899"><text:s text:c="12"/>&lt;option&gt;Community Festival&lt;/option&gt;</text:p>
      <text:p text:style-name="P1900"><text:s text:c="12"/>&lt;option&gt;Other&lt;/option&gt;</text:p>
      <text:p text:style-name="P1901"><text:s text:c="10"/>&lt;/select&gt;</text:p>
      <text:p text:style-name="P1902"><text:s text:c="8"/>&lt;/div&gt;</text:p>
      <text:p text:style-name="P1903"><text:s text:c="8"/>&lt;div&gt;</text:p>
      <text:p text:style-name="P1904"><text:s text:c="10"/>&lt;label class="form-label"&gt;Event Date&lt;/label&gt;</text:p>
      <text:p text:style-name="P1905"><text:s text:c="10"/>&lt;input type="date" class="form-input" /&gt;</text:p>
      <text:p text:style-name="P1906"><text:s text:c="8"/>&lt;/div&gt;</text:p>
      <text:p text:style-name="P1907"><text:s text:c="6"/>&lt;/div&gt;</text:p>
      <text:p text:style-name="P1908"><text:s text:c="6"/>&lt;div class="form-group"&gt;</text:p>
      <text:p text:style-name="P1909"><text:s text:c="8"/>&lt;label class="form-label"&gt;Message / Details&lt;/label&gt;</text:p>
      <text:p text:style-name="P1910"><text:s text:c="8"/>&lt;textarea class="form-textarea" placeholder="Tell us about your event — venue, expected guests, services needed..."&gt;&lt;/textarea&gt;</text:p>
      <text:p text:style-name="P1911"><text:s text:c="6"/>&lt;/div&gt;</text:p>
      <text:p text:style-name="P1912"><text:s text:c="6"/>&lt;button class="form-submit" onclick="handleSubmit(event)"&gt;Send Message &amp;amp; Book Now&lt;/button&gt;</text:p>
      <text:p text:style-name="P1913"><text:s text:c="4"/>&lt;/div&gt;</text:p>
      <text:p text:style-name="P1914"><text:s text:c="2"/>&lt;/div&gt;</text:p>
      <text:p text:style-name="P1915">&lt;/section&gt;</text:p>
      <text:p text:style-name="P1916"/>
      <text:p text:style-name="P1917">&lt;!-- FOOTER --&gt;</text:p>
      <text:p text:style-name="P1918">&lt;footer&gt;</text:p>
      <text:p text:style-name="P1919"><text:s text:c="2"/>&lt;div class="footer-inner"&gt;</text:p>
      <text:p text:style-name="P1920"><text:s text:c="4"/>&lt;div class="footer-brand"&gt;</text:p>
      <text:p text:style-name="P1921"><text:s text:c="6"/>&lt;div style="display:flex;align-items:center;gap:12px;margin-bottom:4px;"&gt;</text:p>
      <text:p text:style-name="P1922"><text:s text:c="8"/>&lt;svg viewBox="0 0 80 80" xmlns="http://www.w3.org/2000/svg" width="38" height="38"&gt;</text:p>
      <text:p text:style-name="P1923"><text:s text:c="10"/>&lt;path d="M12 62 L12 20 L38 55 L38 20" stroke="#1a3a20" stroke-width="9" fill="none" stroke-linecap="round"/&gt;</text:p>
      <text:p text:style-name="P1924"><text:s text:c="10"/>&lt;path d="M38 20 L62 55 L62 20" stroke="#1a3a20" stroke-width="9" fill="none" stroke-linecap="round"/&gt;</text:p>
      <text:p text:style-name="P1925"><text:s text:c="10"/>&lt;path d="M8 48 Q20 28 36 42 Q52 58 66 30" stroke="#2d6a3f" stroke-width="5" fill="none" stroke-linecap="round"/&gt;</text:p>
      <text:p text:style-name="P1926"><text:s text:c="10"/>&lt;path d="M8 48 Q20 28 36 42 Q52 58 66 30" stroke="#52b36b" stroke-width="2.5" fill="none" stroke-linecap="round" opacity="0.7"/&gt;</text:p>
      <text:p text:style-name="P1927"><text:s text:c="10"/>&lt;rect x="53" y="22" width="4" height="20" rx="2" fill="#2d6a3f"/&gt;</text:p>
      <text:p text:style-name="P1928"><text:s text:c="10"/>&lt;rect x="59" y="18" width="4" height="24" rx="2" fill="#3d8b52"/&gt;</text:p>
      <text:p text:style-name="P1929"><text:s text:c="10"/>&lt;rect x="65" y="14" width="4" height="28" rx="2" fill="#52b36b"/&gt;</text:p>
      <text:p text:style-name="P1930"><text:s text:c="10"/>&lt;rect x="71" y="20" width="4" height="22" rx="2" fill="#3d8b52"/&gt;</text:p>
      <text:p text:style-name="P1931"><text:s text:c="8"/>&lt;/svg&gt;</text:p>
      <text:p text:style-name="P1932"><text:s text:c="8"/>&lt;div&gt;</text:p>
      <text:p text:style-name="P1933"><text:s text:c="10"/>&lt;div style="font-family:'Bebas Neue',sans-serif;font-size:1.2rem;letter-spacing:2px;color:#f0f7f1;"&gt;N-AUDIO&lt;/div&gt;</text:p>
      <text:p text:style-name="P1934"><text:s text:c="10"/>&lt;div style="font-size:0.62rem;color:#52b36b;letter-spacing:1.5px;text-transform:uppercase;font-weight:500;"&gt;Lights &amp;amp; Sound&lt;/div&gt;</text:p>
      <text:p text:style-name="P1935"><text:s text:c="8"/>&lt;/div&gt;</text:p>
      <text:p text:style-name="P1936"><text:s text:c="6"/>&lt;/div&gt;</text:p>
      <text:p text:style-name="P1937"><text:s text:c="6"/>&lt;p&gt;Professional Sound, Lights &amp;amp; Event Production in Coron, Palawan. Making every event extraordinary since day one.&lt;/p&gt;</text:p>
      <text:p text:style-name="P1938"><text:s text:c="4"/>&lt;/div&gt;</text:p>
      <text:p text:style-name="P1939"><text:s text:c="4"/>&lt;div class="footer-col"&gt;</text:p>
      <text:p text:style-name="P1940"><text:s text:c="6"/>&lt;h4&gt;Services&lt;/h4&gt;</text:p>
      <text:p text:style-name="P1941"><text:s text:c="6"/>&lt;ul&gt;</text:p>
      <text:p text:style-name="P1942"><text:s text:c="8"/>&lt;li&gt;&lt;a href="#services"&gt;Sound System Rental&lt;/a&gt;&lt;/li&gt;</text:p>
      <text:p text:style-name="P1943"><text:s text:c="8"/>&lt;li&gt;&lt;a href="#services"&gt;Professional Lighting&lt;/a&gt;&lt;/li&gt;</text:p>
      <text:p text:style-name="P1944"><text:s text:c="8"/>&lt;li&gt;&lt;a href="#services"&gt;LED Wall Displays&lt;/a&gt;&lt;/li&gt;</text:p>
      <text:p text:style-name="P1945"><text:s text:c="8"/>&lt;li&gt;&lt;a href="#packages"&gt;Event Packages&lt;/a&gt;&lt;/li&gt;</text:p>
      <text:p text:style-name="P1946"><text:s text:c="6"/>&lt;/ul&gt;</text:p>
      <text:p text:style-name="P1947"><text:s text:c="4"/>&lt;/div&gt;</text:p>
      <text:soft-page-break/>
      <text:p text:style-name="P1948"><text:s text:c="4"/>&lt;div class="footer-col"&gt;</text:p>
      <text:p text:style-name="P1949"><text:s text:c="6"/>&lt;h4&gt;Quick Links&lt;/h4&gt;</text:p>
      <text:p text:style-name="P1950"><text:s text:c="6"/>&lt;ul&gt;</text:p>
      <text:p text:style-name="P1951"><text:s text:c="8"/>&lt;li&gt;&lt;a href="#about"&gt;About Us&lt;/a&gt;&lt;/li&gt;</text:p>
      <text:p text:style-name="P1952"><text:s text:c="8"/>&lt;li&gt;&lt;a href="#gallery"&gt;Gallery&lt;/a&gt;&lt;/li&gt;</text:p>
      <text:p text:style-name="P1953"><text:s text:c="8"/>&lt;li&gt;&lt;a href="#testimonials"&gt;Testimonials&lt;/a&gt;&lt;/li&gt;</text:p>
      <text:p text:style-name="P1954"><text:s text:c="8"/>&lt;li&gt;&lt;a href="#faq"&gt;FAQ&lt;/a&gt;&lt;/li&gt;</text:p>
      <text:p text:style-name="P1955"><text:s text:c="8"/>&lt;li&gt;&lt;a href="#contact"&gt;Contact&lt;/a&gt;&lt;/li&gt;</text:p>
      <text:p text:style-name="P1956"><text:s text:c="6"/>&lt;/ul&gt;</text:p>
      <text:p text:style-name="P1957"><text:s text:c="4"/>&lt;/div&gt;</text:p>
      <text:p text:style-name="P1958"><text:s text:c="2"/>&lt;/div&gt;</text:p>
      <text:p text:style-name="P1959"><text:s text:c="2"/>&lt;div class="footer-bottom"&gt;</text:p>
      <text:p text:style-name="P1960"><text:s text:c="4"/>&lt;p&gt;2025 N Audio Lights &amp;amp; Sound. All rights reserved. Coron, Palawan, Philippines. Designed with &lt;span&gt;care&lt;/span&gt;.&lt;/p&gt;</text:p>
      <text:p text:style-name="P1961"><text:s text:c="2"/>&lt;/div&gt;</text:p>
      <text:p text:style-name="P1962">&lt;/footer&gt;</text:p>
      <text:p text:style-name="P1963"/>
      <text:p text:style-name="P1964">&lt;script&gt;</text:p>
      <text:p text:style-name="P1965"><text:s text:c="2"/>// FAQ toggle</text:p>
      <text:p text:style-name="P1966"><text:s text:c="2"/>function toggleFaq(btn) {</text:p>
      <text:p text:style-name="P1967"><text:s text:c="4"/>const item = btn.parentElement;</text:p>
      <text:p text:style-name="P1968"><text:s text:c="4"/>const isOpen = item.classList.contains('open');</text:p>
      <text:p text:style-name="P1969"><text:s text:c="4"/>document.querySelectorAll('.faq-item').forEach(i =&gt; i.classList.remove('open'));</text:p>
      <text:p text:style-name="P1970"><text:s text:c="4"/>if (!isOpen) item.classList.add('open');</text:p>
      <text:p text:style-name="P1971"><text:s text:c="2"/>}</text:p>
      <text:p text:style-name="P1972"/>
      <text:p text:style-name="P1973"><text:s text:c="2"/>// Scroll reveal</text:p>
      <text:p text:style-name="P1974"><text:s text:c="2"/>const reveals = document.querySelectorAll('.reveal');</text:p>
      <text:p text:style-name="P1975"><text:s text:c="2"/>const observer = new IntersectionObserver((entries) =&gt; {</text:p>
      <text:p text:style-name="P1976"><text:s text:c="4"/>entries.forEach((entry, i) =&gt; {</text:p>
      <text:p text:style-name="P1977"><text:s text:c="6"/>if (entry.isIntersecting) {</text:p>
      <text:p text:style-name="P1978"><text:s text:c="8"/>setTimeout(() =&gt; {</text:p>
      <text:p text:style-name="P1979"><text:s text:c="10"/>entry.target.classList.add('visible');</text:p>
      <text:p text:style-name="P1980"><text:s text:c="8"/>}, 80);</text:p>
      <text:p text:style-name="P1981"><text:s text:c="8"/>observer.unobserve(entry.target);</text:p>
      <text:p text:style-name="P1982"><text:s text:c="6"/>}</text:p>
      <text:p text:style-name="P1983"><text:s text:c="4"/>});</text:p>
      <text:p text:style-name="P1984"><text:s text:c="2"/>}, { threshold: 0.1, rootMargin: '0px 0px -40px 0px' });</text:p>
      <text:p text:style-name="P1985"><text:s text:c="2"/>reveals.forEach(el =&gt; observer.observe(el));</text:p>
      <text:p text:style-name="P1986"/>
      <text:soft-page-break/>
      <text:p text:style-name="P1987"><text:s text:c="2"/>// Nav scroll effect</text:p>
      <text:p text:style-name="P1988"><text:s text:c="2"/>const nav = document.querySelector('nav');</text:p>
      <text:p text:style-name="P1989"><text:s text:c="2"/>window.addEventListener('scroll', () =&gt; {</text:p>
      <text:p text:style-name="P1990"><text:s text:c="4"/>if (window.scrollY &gt; 60) {</text:p>
      <text:p text:style-name="P1991"><text:s text:c="6"/>nav.style.background = 'rgba(6,14,8,0.98)';</text:p>
      <text:p text:style-name="P1992"><text:s text:c="6"/>nav.style.boxShadow = '0 4px 30px rgba(0,0,0,0.5)';</text:p>
      <text:p text:style-name="P1993"><text:s text:c="4"/>} else {</text:p>
      <text:p text:style-name="P1994"><text:s text:c="6"/>nav.style.background = '';</text:p>
      <text:p text:style-name="P1995"><text:s text:c="6"/>nav.style.boxShadow = '';</text:p>
      <text:p text:style-name="P1996"><text:s text:c="4"/>}</text:p>
      <text:p text:style-name="P1997"><text:s text:c="2"/>});</text:p>
      <text:p text:style-name="P1998"/>
      <text:p text:style-name="P1999"><text:s text:c="2"/>// Form submit</text:p>
      <text:p text:style-name="P2000"><text:s text:c="2"/>function handleSubmit(e) {</text:p>
      <text:p text:style-name="P2001"><text:s text:c="4"/>e.preventDefault();</text:p>
      <text:p text:style-name="P2002"><text:s text:c="4"/>const btn = e.target;</text:p>
      <text:p text:style-name="P2003"><text:s text:c="4"/>btn.textContent = 'Message Sent!';</text:p>
      <text:p text:style-name="P2004"><text:s text:c="4"/>btn.style.background = 'linear-gradient(135deg,#1f4a28,#2d6a3f)';</text:p>
      <text:p text:style-name="P2005"><text:s text:c="4"/>setTimeout(() =&gt; {</text:p>
      <text:p text:style-name="P2006"><text:s text:c="6"/>btn.textContent = 'Send Message &amp; Book Now';</text:p>
      <text:p text:style-name="P2007"><text:s text:c="6"/>btn.style.background = '';</text:p>
      <text:p text:style-name="P2008"><text:s text:c="4"/>}, 3000);</text:p>
      <text:p text:style-name="P2009"><text:s text:c="2"/>}</text:p>
      <text:p text:style-name="P2010">&lt;/script&gt;</text:p>
      <text:p text:style-name="P2011">&lt;/body&gt;</text:p>
      <text:p text:style-name="NoSpacing"><text:span text:style-name="T2012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pleSystemUIFont" svg:font-family="AppleSystemUIFont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isselectedend" style:display-name="isselectedend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6-11T19:46:00Z</meta:creation-date>
    <dc:date>2026-06-11T19:46:00Z</dc:date>
    <meta:print-date>2026-06-11T19:45:00Z</meta:print-date>
    <meta:template xlink:href="Normal.dotm" xlink:type="simple"/>
    <meta:editing-cycles>2</meta:editing-cycles>
    <meta:editing-duration>PT0S</meta:editing-duration>
    <meta:document-statistic meta:page-count="55" meta:paragraph-count="129" meta:word-count="9685" meta:character-count="64765" meta:row-count="460" meta:non-whitespace-character-count="55209"/>
  </office:meta>
</office:document-meta>
</file>